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 table:null-year="1950"/>
      <table:table table:name="demo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Star Name</text:p>
          </table:table-cell>
        </table:table-row>
        <table:table-row table:style-name="ro1">
          <table:table-cell table:formula="of:=COM.EXAMPLE.JULIANDATE.JULIANDATEIMPL.FROMJULIANDATE([.B2])" office:value-type="date" office:date-value="2025-07-03T01:01:55.20001" calcext:value-type="date">
            <text:p>2025-07-03</text:p>
          </table:table-cell>
          <table:table-cell office:value-type="float" office:value="2460859.543" calcext:value-type="float">
            <text:p>2460859.54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])" office:value-type="date" office:date-value="2025-07-03T06:20:18.23998" calcext:value-type="date">
            <text:p>2025-07-03</text:p>
          </table:table-cell>
          <table:table-cell office:value-type="float" office:value="2460859.7641" calcext:value-type="float">
            <text:p>2460859.764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])" office:value-type="date" office:date-value="2025-07-05T00:31:59.80801" calcext:value-type="date">
            <text:p>2025-07-05</text:p>
          </table:table-cell>
          <table:table-cell office:value-type="float" office:value="2460861.52222" calcext:value-type="float">
            <text:p>2460861.5222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])" office:value-type="date" office:date-value="2025-07-05T01:08:32.64001" calcext:value-type="date">
            <text:p>2025-07-05</text:p>
          </table:table-cell>
          <table:table-cell office:value-type="float" office:value="2460861.5476" calcext:value-type="float">
            <text:p>2460861.5476</text:p>
          </table:table-cell>
          <table:table-cell office:value-type="float" office:value="7.238" calcext:value-type="float">
            <text:p>7.23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])" office:value-type="date" office:date-value="2025-07-06T01:01:46.55998" calcext:value-type="date">
            <text:p>2025-07-06</text:p>
          </table:table-cell>
          <table:table-cell office:value-type="float" office:value="2460862.5429" calcext:value-type="float">
            <text:p>2460862.5429</text:p>
          </table:table-cell>
          <table:table-cell office:value-type="float" office:value="7.243" calcext:value-type="float">
            <text:p>7.24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])" office:value-type="date" office:date-value="2025-07-08T02:13:03.36" calcext:value-type="date">
            <text:p>2025-07-08</text:p>
          </table:table-cell>
          <table:table-cell office:value-type="float" office:value="2460864.5924" calcext:value-type="float">
            <text:p>2460864.592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])" office:value-type="date" office:date-value="2025-07-09T02:22:59.51999" calcext:value-type="date">
            <text:p>2025-07-09</text:p>
          </table:table-cell>
          <table:table-cell office:value-type="float" office:value="2460865.5993" calcext:value-type="float">
            <text:p>2460865.599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])" office:value-type="date" office:date-value="2025-07-10T02:28:01.92" calcext:value-type="date">
            <text:p>2025-07-10</text:p>
          </table:table-cell>
          <table:table-cell office:value-type="float" office:value="2460866.6028" calcext:value-type="float">
            <text:p>2460866.602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])" office:value-type="date" office:date-value="2025-07-12T09:11:59.71201" calcext:value-type="date">
            <text:p>2025-07-12</text:p>
          </table:table-cell>
          <table:table-cell office:value-type="float" office:value="2460868.88333" calcext:value-type="float">
            <text:p>2460868.8833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])" office:value-type="date" office:date-value="2025-07-13T06:38:00.09598" calcext:value-type="date">
            <text:p>2025-07-13</text:p>
          </table:table-cell>
          <table:table-cell office:value-type="float" office:value="2460869.77639" calcext:value-type="float">
            <text:p>2460869.7763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])" office:value-type="date" office:date-value="2025-07-15T02:10:01.91998" calcext:value-type="date">
            <text:p>2025-07-15</text:p>
          </table:table-cell>
          <table:table-cell office:value-type="float" office:value="2460871.5903" calcext:value-type="float">
            <text:p>2460871.590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])" office:value-type="date" office:date-value="2025-07-16T02:15:04.31999" calcext:value-type="date">
            <text:p>2025-07-16</text:p>
          </table:table-cell>
          <table:table-cell office:value-type="float" office:value="2460872.5938" calcext:value-type="float">
            <text:p>2460872.593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])" office:value-type="date" office:date-value="2025-07-19T22:06:48.95999" calcext:value-type="date">
            <text:p>2025-07-19</text:p>
          </table:table-cell>
          <table:table-cell office:value-type="float" office:value="2460876.4214" calcext:value-type="float">
            <text:p>2460876.4214</text:p>
          </table:table-cell>
          <table:table-cell office:value-type="float" office:value="7.254" calcext:value-type="float">
            <text:p>7.25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])" office:value-type="date" office:date-value="2025-07-22T10:27:00.288" calcext:value-type="date">
            <text:p>2025-07-22</text:p>
          </table:table-cell>
          <table:table-cell office:value-type="float" office:value="2460878.93542" calcext:value-type="float">
            <text:p>2460878.9354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])" office:value-type="date" office:date-value="2025-07-23T01:25:06.24002" calcext:value-type="date">
            <text:p>2025-07-23</text:p>
          </table:table-cell>
          <table:table-cell office:value-type="float" office:value="2460879.5591" calcext:value-type="float">
            <text:p>2460879.5591</text:p>
          </table:table-cell>
          <table:table-cell office:value-type="float" office:value="7.316" calcext:value-type="float">
            <text:p>7.31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])" office:value-type="date" office:date-value="2025-07-24T06:31:00.192" calcext:value-type="date">
            <text:p>2025-07-24</text:p>
          </table:table-cell>
          <table:table-cell office:value-type="float" office:value="2460880.77153" calcext:value-type="float">
            <text:p>2460880.7715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])" office:value-type="date" office:date-value="2025-07-25T02:25:00.47999" calcext:value-type="date">
            <text:p>2025-07-25</text:p>
          </table:table-cell>
          <table:table-cell office:value-type="float" office:value="2460881.6007" calcext:value-type="float">
            <text:p>2460881.600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])" office:value-type="date" office:date-value="2025-07-25T21:11:00.096" calcext:value-type="date">
            <text:p>2025-07-25</text:p>
          </table:table-cell>
          <table:table-cell office:value-type="float" office:value="2460882.38264" calcext:value-type="float">
            <text:p>2460882.3826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])" office:value-type="date" office:date-value="2025-07-26T02:22:59.51999" calcext:value-type="date">
            <text:p>2025-07-26</text:p>
          </table:table-cell>
          <table:table-cell office:value-type="float" office:value="2460882.5993" calcext:value-type="float">
            <text:p>2460882.599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])" office:value-type="date" office:date-value="2025-07-26T02:25:53.18398" calcext:value-type="date">
            <text:p>2025-07-26</text:p>
          </table:table-cell>
          <table:table-cell office:value-type="float" office:value="2460882.60131" calcext:value-type="float">
            <text:p>2460882.60131</text:p>
          </table:table-cell>
          <table:table-cell office:value-type="float" office:value="8.8528" calcext:value-type="float">
            <text:p>8.852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])" office:value-type="date" office:date-value="2025-07-26T02:26:58.848" calcext:value-type="date">
            <text:p>2025-07-26</text:p>
          </table:table-cell>
          <table:table-cell office:value-type="float" office:value="2460882.60207" calcext:value-type="float">
            <text:p>2460882.60207</text:p>
          </table:table-cell>
          <table:table-cell office:value-type="float" office:value="8.893" calcext:value-type="float">
            <text:p>8.89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])" office:value-type="date" office:date-value="2025-07-26T02:28:03.64801" calcext:value-type="date">
            <text:p>2025-07-26</text:p>
          </table:table-cell>
          <table:table-cell office:value-type="float" office:value="2460882.60282" calcext:value-type="float">
            <text:p>2460882.60282</text:p>
          </table:table-cell>
          <table:table-cell office:value-type="float" office:value="8.7843" calcext:value-type="float">
            <text:p>8.784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])" office:value-type="date" office:date-value="2025-07-26T02:29:08.44798" calcext:value-type="date">
            <text:p>2025-07-26</text:p>
          </table:table-cell>
          <table:table-cell office:value-type="float" office:value="2460882.60357" calcext:value-type="float">
            <text:p>2460882.60357</text:p>
          </table:table-cell>
          <table:table-cell office:value-type="float" office:value="8.9456" calcext:value-type="float">
            <text:p>8.945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])" office:value-type="date" office:date-value="2025-07-26T02:30:14.112" calcext:value-type="date">
            <text:p>2025-07-26</text:p>
          </table:table-cell>
          <table:table-cell office:value-type="float" office:value="2460882.60433" calcext:value-type="float">
            <text:p>2460882.60433</text:p>
          </table:table-cell>
          <table:table-cell office:value-type="float" office:value="8.9125" calcext:value-type="float">
            <text:p>8.912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])" office:value-type="date" office:date-value="2025-07-26T02:31:18.91201" calcext:value-type="date">
            <text:p>2025-07-26</text:p>
          </table:table-cell>
          <table:table-cell office:value-type="float" office:value="2460882.60508" calcext:value-type="float">
            <text:p>2460882.60508</text:p>
          </table:table-cell>
          <table:table-cell office:value-type="float" office:value="8.8097" calcext:value-type="float">
            <text:p>8.809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])" office:value-type="date" office:date-value="2025-07-26T02:32:24.57599" calcext:value-type="date">
            <text:p>2025-07-26</text:p>
          </table:table-cell>
          <table:table-cell office:value-type="float" office:value="2460882.60584" calcext:value-type="float">
            <text:p>2460882.60584</text:p>
          </table:table-cell>
          <table:table-cell office:value-type="float" office:value="8.8806" calcext:value-type="float">
            <text:p>8.880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])" office:value-type="date" office:date-value="2025-07-26T02:33:29.376" calcext:value-type="date">
            <text:p>2025-07-26</text:p>
          </table:table-cell>
          <table:table-cell office:value-type="float" office:value="2460882.60659" calcext:value-type="float">
            <text:p>2460882.60659</text:p>
          </table:table-cell>
          <table:table-cell office:value-type="float" office:value="8.9097" calcext:value-type="float">
            <text:p>8.909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])" office:value-type="date" office:date-value="2025-07-26T02:34:34.17601" calcext:value-type="date">
            <text:p>2025-07-26</text:p>
          </table:table-cell>
          <table:table-cell office:value-type="float" office:value="2460882.60734" calcext:value-type="float">
            <text:p>2460882.60734</text:p>
          </table:table-cell>
          <table:table-cell office:value-type="float" office:value="8.8029" calcext:value-type="float">
            <text:p>8.802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])" office:value-type="date" office:date-value="2025-07-26T02:35:39.83999" calcext:value-type="date">
            <text:p>2025-07-26</text:p>
          </table:table-cell>
          <table:table-cell office:value-type="float" office:value="2460882.6081" calcext:value-type="float">
            <text:p>2460882.6081</text:p>
          </table:table-cell>
          <table:table-cell office:value-type="float" office:value="8.9041" calcext:value-type="float">
            <text:p>8.904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])" office:value-type="date" office:date-value="2025-07-26T02:36:44.64" calcext:value-type="date">
            <text:p>2025-07-26</text:p>
          </table:table-cell>
          <table:table-cell office:value-type="float" office:value="2460882.60885" calcext:value-type="float">
            <text:p>2460882.60885</text:p>
          </table:table-cell>
          <table:table-cell office:value-type="float" office:value="8.8429" calcext:value-type="float">
            <text:p>8.842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])" office:value-type="date" office:date-value="2025-07-26T02:57:08.92798" calcext:value-type="date">
            <text:p>2025-07-26</text:p>
          </table:table-cell>
          <table:table-cell office:value-type="float" office:value="2460882.62302" calcext:value-type="float">
            <text:p>2460882.62302</text:p>
          </table:table-cell>
          <table:table-cell office:value-type="float" office:value="8.9275" calcext:value-type="float">
            <text:p>8.927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])" office:value-type="date" office:date-value="2025-07-26T02:58:13.728" calcext:value-type="date">
            <text:p>2025-07-26</text:p>
          </table:table-cell>
          <table:table-cell office:value-type="float" office:value="2460882.62377" calcext:value-type="float">
            <text:p>2460882.62377</text:p>
          </table:table-cell>
          <table:table-cell office:value-type="float" office:value="9.1474" calcext:value-type="float">
            <text:p>9.147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])" office:value-type="date" office:date-value="2025-07-26T02:59:19.39201" calcext:value-type="date">
            <text:p>2025-07-26</text:p>
          </table:table-cell>
          <table:table-cell office:value-type="float" office:value="2460882.62453" calcext:value-type="float">
            <text:p>2460882.62453</text:p>
          </table:table-cell>
          <table:table-cell office:value-type="float" office:value="9.0926" calcext:value-type="float">
            <text:p>9.092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])" office:value-type="date" office:date-value="2025-07-26T03:00:24.19198" calcext:value-type="date">
            <text:p>2025-07-26</text:p>
          </table:table-cell>
          <table:table-cell office:value-type="float" office:value="2460882.62528" calcext:value-type="float">
            <text:p>2460882.62528</text:p>
          </table:table-cell>
          <table:table-cell office:value-type="float" office:value="9.0073" calcext:value-type="float">
            <text:p>9.007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])" office:value-type="date" office:date-value="2025-07-26T03:01:29.856" calcext:value-type="date">
            <text:p>2025-07-26</text:p>
          </table:table-cell>
          <table:table-cell office:value-type="float" office:value="2460882.62604" calcext:value-type="float">
            <text:p>2460882.62604</text:p>
          </table:table-cell>
          <table:table-cell office:value-type="float" office:value="8.9556" calcext:value-type="float">
            <text:p>8.955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])" office:value-type="date" office:date-value="2025-07-26T03:02:34.65601" calcext:value-type="date">
            <text:p>2025-07-26</text:p>
          </table:table-cell>
          <table:table-cell office:value-type="float" office:value="2460882.62679" calcext:value-type="float">
            <text:p>2460882.62679</text:p>
          </table:table-cell>
          <table:table-cell office:value-type="float" office:value="8.8194" calcext:value-type="float">
            <text:p>8.819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8])" office:value-type="date" office:date-value="2025-07-26T03:03:40.31999" calcext:value-type="date">
            <text:p>2025-07-26</text:p>
          </table:table-cell>
          <table:table-cell office:value-type="float" office:value="2460882.62755" calcext:value-type="float">
            <text:p>2460882.62755</text:p>
          </table:table-cell>
          <table:table-cell office:value-type="float" office:value="8.7612" calcext:value-type="float">
            <text:p>8.761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9])" office:value-type="date" office:date-value="2025-07-26T03:04:45.12" calcext:value-type="date">
            <text:p>2025-07-26</text:p>
          </table:table-cell>
          <table:table-cell office:value-type="float" office:value="2460882.6283" calcext:value-type="float">
            <text:p>2460882.6283</text:p>
          </table:table-cell>
          <table:table-cell office:value-type="float" office:value="8.8406" calcext:value-type="float">
            <text:p>8.840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0])" office:value-type="date" office:date-value="2025-07-26T03:05:50.78402" calcext:value-type="date">
            <text:p>2025-07-26</text:p>
          </table:table-cell>
          <table:table-cell office:value-type="float" office:value="2460882.62906" calcext:value-type="float">
            <text:p>2460882.62906</text:p>
          </table:table-cell>
          <table:table-cell office:value-type="float" office:value="8.7866" calcext:value-type="float">
            <text:p>8.786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1])" office:value-type="date" office:date-value="2025-07-26T03:06:55.58399" calcext:value-type="date">
            <text:p>2025-07-26</text:p>
          </table:table-cell>
          <table:table-cell office:value-type="float" office:value="2460882.62981" calcext:value-type="float">
            <text:p>2460882.62981</text:p>
          </table:table-cell>
          <table:table-cell office:value-type="float" office:value="8.7681" calcext:value-type="float">
            <text:p>8.768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2])" office:value-type="date" office:date-value="2025-07-26T03:08:00.384" calcext:value-type="date">
            <text:p>2025-07-26</text:p>
          </table:table-cell>
          <table:table-cell office:value-type="float" office:value="2460882.63056" calcext:value-type="float">
            <text:p>2460882.63056</text:p>
          </table:table-cell>
          <table:table-cell office:value-type="float" office:value="8.8837" calcext:value-type="float">
            <text:p>8.883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3])" office:value-type="date" office:date-value="2025-07-26T03:09:06.04801" calcext:value-type="date">
            <text:p>2025-07-26</text:p>
          </table:table-cell>
          <table:table-cell office:value-type="float" office:value="2460882.63132" calcext:value-type="float">
            <text:p>2460882.63132</text:p>
          </table:table-cell>
          <table:table-cell office:value-type="float" office:value="8.8281" calcext:value-type="float">
            <text:p>8.828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4])" office:value-type="date" office:date-value="2025-07-26T03:10:10.84798" calcext:value-type="date">
            <text:p>2025-07-26</text:p>
          </table:table-cell>
          <table:table-cell office:value-type="float" office:value="2460882.63207" calcext:value-type="float">
            <text:p>2460882.63207</text:p>
          </table:table-cell>
          <table:table-cell office:value-type="float" office:value="8.7714" calcext:value-type="float">
            <text:p>8.771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5])" office:value-type="date" office:date-value="2025-07-26T03:11:16.512" calcext:value-type="date">
            <text:p>2025-07-26</text:p>
          </table:table-cell>
          <table:table-cell office:value-type="float" office:value="2460882.63283" calcext:value-type="float">
            <text:p>2460882.63283</text:p>
          </table:table-cell>
          <table:table-cell office:value-type="float" office:value="8.8503" calcext:value-type="float">
            <text:p>8.850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6])" office:value-type="date" office:date-value="2025-07-26T23:35:00.00958" calcext:value-type="date">
            <text:p>2025-07-26</text:p>
          </table:table-cell>
          <table:table-cell office:value-type="float" office:value="2460883.482639" calcext:value-type="float">
            <text:p>2460883.48263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7])" office:value-type="date" office:date-value="2025-07-27T02:36:57.60001" calcext:value-type="date">
            <text:p>2025-07-27</text:p>
          </table:table-cell>
          <table:table-cell office:value-type="float" office:value="2460883.609" calcext:value-type="float">
            <text:p>2460883.60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8])" office:value-type="date" office:date-value="2025-07-27T23:47:02.39999" calcext:value-type="date">
            <text:p>2025-07-27</text:p>
          </table:table-cell>
          <table:table-cell office:value-type="float" office:value="2460884.491" calcext:value-type="float">
            <text:p>2460884.49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49])" office:value-type="date" office:date-value="2025-07-28T10:11:59.99998" calcext:value-type="date">
            <text:p>2025-07-28</text:p>
          </table:table-cell>
          <table:table-cell office:value-type="float" office:value="2460884.925" calcext:value-type="float">
            <text:p>2460884.92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0])" office:value-type="date" office:date-value="2025-07-29T00:13:58.07998" calcext:value-type="date">
            <text:p>2025-07-29</text:p>
          </table:table-cell>
          <table:table-cell office:value-type="float" office:value="2460885.5097" calcext:value-type="float">
            <text:p>2460885.509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1])" office:value-type="date" office:date-value="2025-07-29T06:56:00.00008" calcext:value-type="date">
            <text:p>2025-07-29</text:p>
          </table:table-cell>
          <table:table-cell office:value-type="float" office:value="2460885.78888889" calcext:value-type="float">
            <text:p>2460885.7888888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2])" office:value-type="date" office:date-value="2025-07-29T23:43:35.03998" calcext:value-type="date">
            <text:p>2025-07-29</text:p>
          </table:table-cell>
          <table:table-cell office:value-type="float" office:value="2460886.4886" calcext:value-type="float">
            <text:p>2460886.4886</text:p>
          </table:table-cell>
          <table:table-cell office:value-type="float" office:value="7.259" calcext:value-type="float">
            <text:p>7.25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3])" office:value-type="date" office:date-value="2025-08-03T00:20:00.96001" calcext:value-type="date">
            <text:p>2025-08-03</text:p>
          </table:table-cell>
          <table:table-cell office:value-type="float" office:value="2460890.5139" calcext:value-type="float">
            <text:p>2460890.513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4])" office:value-type="date" office:date-value="2025-08-04T01:21:04.31998" calcext:value-type="date">
            <text:p>2025-08-04</text:p>
          </table:table-cell>
          <table:table-cell office:value-type="float" office:value="2460891.5563" calcext:value-type="float">
            <text:p>2460891.5563</text:p>
          </table:table-cell>
          <table:table-cell office:value-type="float" office:value="7.275" calcext:value-type="float">
            <text:p>7.27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5])" office:value-type="date" office:date-value="2025-08-04T02:36:57.60001" calcext:value-type="date">
            <text:p>2025-08-04</text:p>
          </table:table-cell>
          <table:table-cell office:value-type="float" office:value="2460891.609" calcext:value-type="float">
            <text:p>2460891.60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6])" office:value-type="date" office:date-value="2025-08-05T02:44:00.96002" calcext:value-type="date">
            <text:p>2025-08-05</text:p>
          </table:table-cell>
          <table:table-cell office:value-type="float" office:value="2460892.6139" calcext:value-type="float">
            <text:p>2460892.613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7])" office:value-type="date" office:date-value="2025-08-06T02:33:56.16" calcext:value-type="date">
            <text:p>2025-08-06</text:p>
          </table:table-cell>
          <table:table-cell office:value-type="float" office:value="2460893.6069" calcext:value-type="float">
            <text:p>2460893.606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8])" office:value-type="date" office:date-value="2025-08-07T01:12:43.19999" calcext:value-type="date">
            <text:p>2025-08-07</text:p>
          </table:table-cell>
          <table:table-cell office:value-type="float" office:value="2460894.5505" calcext:value-type="float">
            <text:p>2460894.5505</text:p>
          </table:table-cell>
          <table:table-cell office:value-type="float" office:value="7.247" calcext:value-type="float">
            <text:p>7.24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59])" office:value-type="date" office:date-value="2025-08-07T02:28:01.92" calcext:value-type="date">
            <text:p>2025-08-07</text:p>
          </table:table-cell>
          <table:table-cell office:value-type="float" office:value="2460894.6028" calcext:value-type="float">
            <text:p>2460894.602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0])" office:value-type="date" office:date-value="2025-08-08T02:33:56.16" calcext:value-type="date">
            <text:p>2025-08-08</text:p>
          </table:table-cell>
          <table:table-cell office:value-type="float" office:value="2460895.6069" calcext:value-type="float">
            <text:p>2460895.606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1])" office:value-type="date" office:date-value="2025-08-08T11:05:00.38398" calcext:value-type="date">
            <text:p>2025-08-08</text:p>
          </table:table-cell>
          <table:table-cell office:value-type="float" office:value="2460895.96181" calcext:value-type="float">
            <text:p>2460895.9618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2])" office:value-type="date" office:date-value="2025-08-09T02:51:56.16002" calcext:value-type="date">
            <text:p>2025-08-09</text:p>
          </table:table-cell>
          <table:table-cell office:value-type="float" office:value="2460896.6194" calcext:value-type="float">
            <text:p>2460896.619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3])" office:value-type="date" office:date-value="2025-08-10T02:56:58.55999" calcext:value-type="date">
            <text:p>2025-08-10</text:p>
          </table:table-cell>
          <table:table-cell office:value-type="float" office:value="2460897.6229" calcext:value-type="float">
            <text:p>2460897.622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4])" office:value-type="date" office:date-value="2025-08-12T01:31:35.04" calcext:value-type="date">
            <text:p>2025-08-12</text:p>
          </table:table-cell>
          <table:table-cell office:value-type="float" office:value="2460899.5636" calcext:value-type="float">
            <text:p>2460899.5636</text:p>
          </table:table-cell>
          <table:table-cell office:value-type="float" office:value="7.224" calcext:value-type="float">
            <text:p>7.22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5])" office:value-type="date" office:date-value="2025-08-12T21:20:59.71202" calcext:value-type="date">
            <text:p>2025-08-12</text:p>
          </table:table-cell>
          <table:table-cell office:value-type="float" office:value="2460900.38958" calcext:value-type="float">
            <text:p>2460900.38958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6])" office:value-type="date" office:date-value="2025-08-15T00:38:00.09598" calcext:value-type="date">
            <text:p>2025-08-15</text:p>
          </table:table-cell>
          <table:table-cell office:value-type="float" office:value="2460902.52639" calcext:value-type="float">
            <text:p>2460902.5263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7])" office:value-type="date" office:date-value="2025-08-17T19:49:35.04002" calcext:value-type="date">
            <text:p>2025-08-17</text:p>
          </table:table-cell>
          <table:table-cell office:value-type="float" office:value="2460905.3261" calcext:value-type="float">
            <text:p>2460905.3261</text:p>
          </table:table-cell>
          <table:table-cell office:value-type="float" office:value="7.154" calcext:value-type="float">
            <text:p>7.15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8])" office:value-type="date" office:date-value="2025-08-18T03:11:59.71201" calcext:value-type="date">
            <text:p>2025-08-18</text:p>
          </table:table-cell>
          <table:table-cell office:value-type="float" office:value="2460905.63333" calcext:value-type="float">
            <text:p>2460905.6333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69])" office:value-type="date" office:date-value="2025-08-19T00:21:10.08002" calcext:value-type="date">
            <text:p>2025-08-19</text:p>
          </table:table-cell>
          <table:table-cell office:value-type="float" office:value="2460906.5147" calcext:value-type="float">
            <text:p>2460906.5147</text:p>
          </table:table-cell>
          <table:table-cell office:value-type="float" office:value="7.217" calcext:value-type="float">
            <text:p>7.21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0])" office:value-type="date" office:date-value="2025-08-19T03:44:29.76001" calcext:value-type="date">
            <text:p>2025-08-19</text:p>
          </table:table-cell>
          <table:table-cell office:value-type="float" office:value="2460906.6559" calcext:value-type="float">
            <text:p>2460906.655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1])" office:value-type="date" office:date-value="2025-08-20T23:31:12" calcext:value-type="date">
            <text:p>2025-08-20</text:p>
          </table:table-cell>
          <table:table-cell office:value-type="float" office:value="2460908.48" calcext:value-type="float">
            <text:p>2460908.4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2])" office:value-type="date" office:date-value="2025-08-22T21:09:59.61602" calcext:value-type="date">
            <text:p>2025-08-22</text:p>
          </table:table-cell>
          <table:table-cell office:value-type="float" office:value="2460910.38194" calcext:value-type="float">
            <text:p>2460910.381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3])" office:value-type="date" office:date-value="2025-08-23T02:28:01.92" calcext:value-type="date">
            <text:p>2025-08-23</text:p>
          </table:table-cell>
          <table:table-cell office:value-type="float" office:value="2460910.6028" calcext:value-type="float">
            <text:p>2460910.602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4])" office:value-type="date" office:date-value="2025-08-24T02:56:58.55999" calcext:value-type="date">
            <text:p>2025-08-24</text:p>
          </table:table-cell>
          <table:table-cell office:value-type="float" office:value="2460911.6229" calcext:value-type="float">
            <text:p>2460911.622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5])" office:value-type="date" office:date-value="2025-08-24T19:33:36" calcext:value-type="date">
            <text:p>2025-08-24</text:p>
          </table:table-cell>
          <table:table-cell office:value-type="float" office:value="2460912.315" calcext:value-type="float">
            <text:p>2460912.31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6])" office:value-type="date" office:date-value="2025-08-25T03:04:01.91999" calcext:value-type="date">
            <text:p>2025-08-25</text:p>
          </table:table-cell>
          <table:table-cell office:value-type="float" office:value="2460912.6278" calcext:value-type="float">
            <text:p>2460912.627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7])" office:value-type="date" office:date-value="2025-08-25T10:23:00.09598" calcext:value-type="date">
            <text:p>2025-08-25</text:p>
          </table:table-cell>
          <table:table-cell office:value-type="float" office:value="2460912.93264" calcext:value-type="float">
            <text:p>2460912.9326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8])" office:value-type="date" office:date-value="2025-08-25T20:18:40.31999" calcext:value-type="date">
            <text:p>2025-08-25</text:p>
          </table:table-cell>
          <table:table-cell office:value-type="float" office:value="2460913.3463" calcext:value-type="float">
            <text:p>2460913.3463</text:p>
          </table:table-cell>
          <table:table-cell office:value-type="float" office:value="7.463" calcext:value-type="float">
            <text:p>7.46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79])" office:value-type="date" office:date-value="2025-08-25T20:21:59.90402" calcext:value-type="date">
            <text:p>2025-08-25</text:p>
          </table:table-cell>
          <table:table-cell office:value-type="float" office:value="2460913.34861" calcext:value-type="float">
            <text:p>2460913.348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0])" office:value-type="date" office:date-value="2025-08-27T23:30:00.28802" calcext:value-type="date">
            <text:p>2025-08-27</text:p>
          </table:table-cell>
          <table:table-cell office:value-type="float" office:value="2460915.47917" calcext:value-type="float">
            <text:p>2460915.4791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1])" office:value-type="date" office:date-value="2025-08-30T20:49:03.35999" calcext:value-type="date">
            <text:p>2025-08-30</text:p>
          </table:table-cell>
          <table:table-cell office:value-type="float" office:value="2460918.3674" calcext:value-type="float">
            <text:p>2460918.367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2])" office:value-type="date" office:date-value="2025-08-31T19:39:47.52001" calcext:value-type="date">
            <text:p>2025-08-31</text:p>
          </table:table-cell>
          <table:table-cell office:value-type="float" office:value="2460919.3193" calcext:value-type="float">
            <text:p>2460919.3193</text:p>
          </table:table-cell>
          <table:table-cell office:value-type="float" office:value="7.316" calcext:value-type="float">
            <text:p>7.31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3])" office:value-type="date" office:date-value="2025-08-31T20:15:21.6" calcext:value-type="date">
            <text:p>2025-08-31</text:p>
          </table:table-cell>
          <table:table-cell office:value-type="float" office:value="2460919.344" calcext:value-type="float">
            <text:p>2460919.34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4])" office:value-type="date" office:date-value="2025-09-01T19:34:00.19202" calcext:value-type="date">
            <text:p>2025-09-01</text:p>
          </table:table-cell>
          <table:table-cell office:value-type="float" office:value="2460920.31528" calcext:value-type="float">
            <text:p>2460920.3152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5])" office:value-type="date" office:date-value="2025-09-03T09:47:59.712" calcext:value-type="date">
            <text:p>2025-09-03</text:p>
          </table:table-cell>
          <table:table-cell office:value-type="float" office:value="2460921.90833" calcext:value-type="float">
            <text:p>2460921.9083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6])" office:value-type="date" office:date-value="2025-09-04T02:30:20.16001" calcext:value-type="date">
            <text:p>2025-09-04</text:p>
          </table:table-cell>
          <table:table-cell office:value-type="float" office:value="2460922.6044" calcext:value-type="float">
            <text:p>2460922.6044</text:p>
          </table:table-cell>
          <table:table-cell office:value-type="float" office:value="7.267" calcext:value-type="float">
            <text:p>7.26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7])" office:value-type="date" office:date-value="2025-09-06T19:18:37.43999" calcext:value-type="date">
            <text:p>2025-09-06</text:p>
          </table:table-cell>
          <table:table-cell office:value-type="float" office:value="2460925.3046" calcext:value-type="float">
            <text:p>2460925.3046</text:p>
          </table:table-cell>
          <table:table-cell office:value-type="float" office:value="7.197" calcext:value-type="float">
            <text:p>7.19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8])" office:value-type="date" office:date-value="2025-09-06T22:14:59.71198" calcext:value-type="date">
            <text:p>2025-09-06</text:p>
          </table:table-cell>
          <table:table-cell office:value-type="float" office:value="2460925.42708" calcext:value-type="float">
            <text:p>2460925.427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89])" office:value-type="date" office:date-value="2025-09-09T03:40:59.80798" calcext:value-type="date">
            <text:p>2025-09-09</text:p>
          </table:table-cell>
          <table:table-cell office:value-type="float" office:value="2460927.65347" calcext:value-type="float">
            <text:p>2460927.65347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0])" office:value-type="date" office:date-value="2025-09-12T18:09:59.61602" calcext:value-type="date">
            <text:p>2025-09-12</text:p>
          </table:table-cell>
          <table:table-cell office:value-type="float" office:value="2460931.25694" calcext:value-type="float">
            <text:p>2460931.2569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1])" office:value-type="date" office:date-value="2025-09-12T21:57:18.02879" calcext:value-type="date">
            <text:p>2025-09-12</text:p>
          </table:table-cell>
          <table:table-cell office:value-type="float" office:value="2460931.414792" calcext:value-type="float">
            <text:p>2460931.41479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2])" office:value-type="date" office:date-value="2025-09-12T21:57:18.02879" calcext:value-type="date">
            <text:p>2025-09-12</text:p>
          </table:table-cell>
          <table:table-cell office:value-type="float" office:value="2460931.414792" calcext:value-type="float">
            <text:p>2460931.414792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3])" office:value-type="date" office:date-value="2025-09-12T21:57:18.02879" calcext:value-type="date">
            <text:p>2025-09-12</text:p>
          </table:table-cell>
          <table:table-cell office:value-type="float" office:value="2460931.414792" calcext:value-type="float">
            <text:p>2460931.414792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4])" office:value-type="date" office:date-value="2025-09-14T03:02:00.09599" calcext:value-type="date">
            <text:p>2025-09-14</text:p>
          </table:table-cell>
          <table:table-cell office:value-type="float" office:value="2460932.62639" calcext:value-type="float">
            <text:p>2460932.6263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5])" office:value-type="date" office:date-value="2025-09-14T18:44:12.48" calcext:value-type="date">
            <text:p>2025-09-14</text:p>
          </table:table-cell>
          <table:table-cell office:value-type="float" office:value="2460933.2807" calcext:value-type="float">
            <text:p>2460933.2807</text:p>
          </table:table-cell>
          <table:table-cell office:value-type="float" office:value="7.223" calcext:value-type="float">
            <text:p>7.22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6])" office:value-type="date" office:date-value="2025-09-15T18:00:00" calcext:value-type="date">
            <text:p>2025-09-15</text:p>
          </table:table-cell>
          <table:table-cell office:value-type="float" office:value="2460934.25" calcext:value-type="float">
            <text:p>2460934.2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7])" office:value-type="date" office:date-value="2025-09-15T19:05:59.71202" calcext:value-type="date">
            <text:p>2025-09-15</text:p>
          </table:table-cell>
          <table:table-cell office:value-type="float" office:value="2460934.29583" calcext:value-type="float">
            <text:p>2460934.2958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8])" office:value-type="date" office:date-value="2025-09-16T10:20:00.38398" calcext:value-type="date">
            <text:p>2025-09-16</text:p>
          </table:table-cell>
          <table:table-cell office:value-type="float" office:value="2460934.93056" calcext:value-type="float">
            <text:p>2460934.9305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99])" office:value-type="date" office:date-value="2025-09-16T23:14:00.38399" calcext:value-type="date">
            <text:p>2025-09-16</text:p>
          </table:table-cell>
          <table:table-cell office:value-type="float" office:value="2460935.46806" calcext:value-type="float">
            <text:p>2460935.4680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 </text:p>
          </table:table-cell>
        </table:table-row>
        <table:table-row table:style-name="ro1">
          <table:table-cell table:formula="of:=COM.EXAMPLE.JULIANDATE.JULIANDATEIMPL.FROMJULIANDATE([.B100])" office:value-type="date" office:date-value="2025-09-18T03:04:59.80799" calcext:value-type="date">
            <text:p>2025-09-18</text:p>
          </table:table-cell>
          <table:table-cell office:value-type="float" office:value="2460936.62847" calcext:value-type="float">
            <text:p>2460936.6284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1])" office:value-type="date" office:date-value="2025-09-18T19:08:23.99999" calcext:value-type="date">
            <text:p>2025-09-18</text:p>
          </table:table-cell>
          <table:table-cell office:value-type="float" office:value="2460937.2975" calcext:value-type="float">
            <text:p>2460937.2975</text:p>
          </table:table-cell>
          <table:table-cell office:value-type="float" office:value="7.212" calcext:value-type="float">
            <text:p>7.21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2])" office:value-type="date" office:date-value="2025-09-19T05:01:49.44002" calcext:value-type="date">
            <text:p>2025-09-19</text:p>
          </table:table-cell>
          <table:table-cell office:value-type="float" office:value="2460937.7096" calcext:value-type="float">
            <text:p>2460937.709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3])" office:value-type="date" office:date-value="2025-09-19T17:50:00.38398" calcext:value-type="date">
            <text:p>2025-09-19</text:p>
          </table:table-cell>
          <table:table-cell office:value-type="float" office:value="2460938.24306" calcext:value-type="float">
            <text:p>2460938.2430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4])" office:value-type="date" office:date-value="2025-09-19T19:33:36" calcext:value-type="date">
            <text:p>2025-09-19</text:p>
          </table:table-cell>
          <table:table-cell office:value-type="float" office:value="2460938.315" calcext:value-type="float">
            <text:p>2460938.31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5])" office:value-type="date" office:date-value="2025-09-19T22:05:59.71202" calcext:value-type="date">
            <text:p>2025-09-19</text:p>
          </table:table-cell>
          <table:table-cell office:value-type="float" office:value="2460938.42083" calcext:value-type="float">
            <text:p>2460938.42083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6])" office:value-type="date" office:date-value="2025-09-20T06:06:54.72002" calcext:value-type="date">
            <text:p>2025-09-20</text:p>
          </table:table-cell>
          <table:table-cell office:value-type="float" office:value="2460938.7548" calcext:value-type="float">
            <text:p>2460938.754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7])" office:value-type="date" office:date-value="2025-09-20T06:20:00.09601" calcext:value-type="date">
            <text:p>2025-09-20</text:p>
          </table:table-cell>
          <table:table-cell office:value-type="float" office:value="2460938.76389" calcext:value-type="float">
            <text:p>2460938.7638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8])" office:value-type="date" office:date-value="2025-09-20T18:29:59.71198" calcext:value-type="date">
            <text:p>2025-09-20</text:p>
          </table:table-cell>
          <table:table-cell office:value-type="float" office:value="2460939.27083" calcext:value-type="float">
            <text:p>2460939.2708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09])" office:value-type="date" office:date-value="2025-09-20T18:35:34.08" calcext:value-type="date">
            <text:p>2025-09-20</text:p>
          </table:table-cell>
          <table:table-cell office:value-type="float" office:value="2460939.2747" calcext:value-type="float">
            <text:p>2460939.2747</text:p>
          </table:table-cell>
          <table:table-cell office:value-type="float" office:value="7.233" calcext:value-type="float">
            <text:p>7.23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0])" office:value-type="date" office:date-value="2025-09-20T21:45:00" calcext:value-type="date">
            <text:p>2025-09-20</text:p>
          </table:table-cell>
          <table:table-cell office:value-type="float" office:value="2460939.40625" calcext:value-type="float">
            <text:p>2460939.4062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1])" office:value-type="date" office:date-value="2025-09-21T00:43:11.99998" calcext:value-type="date">
            <text:p>2025-09-21</text:p>
          </table:table-cell>
          <table:table-cell office:value-type="float" office:value="2460939.53" calcext:value-type="float">
            <text:p>2460939.5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2])" office:value-type="date" office:date-value="2025-09-21T02:50:59.99999" calcext:value-type="date">
            <text:p>2025-09-21</text:p>
          </table:table-cell>
          <table:table-cell office:value-type="float" office:value="2460939.61875" calcext:value-type="float">
            <text:p>2460939.6187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3])" office:value-type="date" office:date-value="2025-09-21T18:49:59.80799" calcext:value-type="date">
            <text:p>2025-09-21</text:p>
          </table:table-cell>
          <table:table-cell office:value-type="float" office:value="2460940.28472" calcext:value-type="float">
            <text:p>2460940.2847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4])" office:value-type="date" office:date-value="2025-09-22T18:04:59.80799" calcext:value-type="date">
            <text:p>2025-09-22</text:p>
          </table:table-cell>
          <table:table-cell office:value-type="float" office:value="2460941.25347" calcext:value-type="float">
            <text:p>2460941.2534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5])" office:value-type="date" office:date-value="2025-09-22T18:47:05.27999" calcext:value-type="date">
            <text:p>2025-09-22</text:p>
          </table:table-cell>
          <table:table-cell office:value-type="float" office:value="2460941.2827" calcext:value-type="float">
            <text:p>2460941.2827</text:p>
          </table:table-cell>
          <table:table-cell office:value-type="float" office:value="7.224" calcext:value-type="float">
            <text:p>7.22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6])" office:value-type="date" office:date-value="2025-09-23T17:50:00.38398" calcext:value-type="date">
            <text:p>2025-09-23</text:p>
          </table:table-cell>
          <table:table-cell office:value-type="float" office:value="2460942.24306" calcext:value-type="float">
            <text:p>2460942.2430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7])" office:value-type="date" office:date-value="2025-09-24T22:56:59.99998" calcext:value-type="date">
            <text:p>2025-09-24</text:p>
          </table:table-cell>
          <table:table-cell office:value-type="float" office:value="2460943.45625" calcext:value-type="float">
            <text:p>2460943.4562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 </text:p>
          </table:table-cell>
        </table:table-row>
        <table:table-row table:style-name="ro1">
          <table:table-cell table:formula="of:=COM.EXAMPLE.JULIANDATE.JULIANDATEIMPL.FROMJULIANDATE([.B118])" office:value-type="date" office:date-value="2025-09-27T01:41:00.096" calcext:value-type="date">
            <text:p>2025-09-27</text:p>
          </table:table-cell>
          <table:table-cell office:value-type="float" office:value="2460945.57014" calcext:value-type="float">
            <text:p>2460945.5701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19])" office:value-type="date" office:date-value="2025-09-27T05:20:58.55999" calcext:value-type="date">
            <text:p>2025-09-27</text:p>
          </table:table-cell>
          <table:table-cell office:value-type="float" office:value="2460945.7229" calcext:value-type="float">
            <text:p>2460945.7229</text:p>
          </table:table-cell>
          <table:table-cell office:value-type="float" office:value="7.157" calcext:value-type="float">
            <text:p>7.15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0])" office:value-type="date" office:date-value="2025-09-27T06:02:00.96" calcext:value-type="date">
            <text:p>2025-09-27</text:p>
          </table:table-cell>
          <table:table-cell office:value-type="float" office:value="2460945.7514" calcext:value-type="float">
            <text:p>2460945.751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1])" office:value-type="date" office:date-value="2025-09-28T01:59:59.97121" calcext:value-type="date">
            <text:p>2025-09-28</text:p>
          </table:table-cell>
          <table:table-cell office:value-type="float" office:value="2460946.583333" calcext:value-type="float">
            <text:p>2460946.583333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2])" office:value-type="date" office:date-value="2025-09-28T04:56:55.67999" calcext:value-type="date">
            <text:p>2025-09-28</text:p>
          </table:table-cell>
          <table:table-cell office:value-type="float" office:value="2460946.7062" calcext:value-type="float">
            <text:p>2460946.7062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3])" office:value-type="date" office:date-value="2025-09-28T21:25:37.92" calcext:value-type="date">
            <text:p>2025-09-28</text:p>
          </table:table-cell>
          <table:table-cell office:value-type="float" office:value="2460947.3928" calcext:value-type="float">
            <text:p>2460947.3928</text:p>
          </table:table-cell>
          <table:table-cell office:value-type="float" office:value="7.305" calcext:value-type="float">
            <text:p>7.30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4])" office:value-type="date" office:date-value="2025-09-29T03:20:00.09601" calcext:value-type="date">
            <text:p>2025-09-29</text:p>
          </table:table-cell>
          <table:table-cell office:value-type="float" office:value="2460947.63889" calcext:value-type="float">
            <text:p>2460947.6388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5])" office:value-type="date" office:date-value="2025-09-29T05:21:41.76" calcext:value-type="date">
            <text:p>2025-09-29</text:p>
          </table:table-cell>
          <table:table-cell office:value-type="float" office:value="2460947.7234" calcext:value-type="float">
            <text:p>2460947.723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6])" office:value-type="date" office:date-value="2025-09-29T17:30:00.28802" calcext:value-type="date">
            <text:p>2025-09-29</text:p>
          </table:table-cell>
          <table:table-cell office:value-type="float" office:value="2460948.22917" calcext:value-type="float">
            <text:p>2460948.2291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7])" office:value-type="date" office:date-value="2025-09-30T03:09:59.96158" calcext:value-type="date">
            <text:p>2025-09-30</text:p>
          </table:table-cell>
          <table:table-cell office:value-type="float" office:value="2460948.631944" calcext:value-type="float">
            <text:p>2460948.63194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8])" office:value-type="date" office:date-value="2025-09-30T07:27:59.99989" calcext:value-type="date">
            <text:p>2025-09-30</text:p>
          </table:table-cell>
          <table:table-cell office:value-type="float" office:value="2460948.81111111" calcext:value-type="float">
            <text:p>2460948.8111111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29])" office:value-type="date" office:date-value="2025-09-30T18:00:00" calcext:value-type="date">
            <text:p>2025-09-30</text:p>
          </table:table-cell>
          <table:table-cell office:value-type="float" office:value="2460949.25" calcext:value-type="float">
            <text:p>2460949.2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0])" office:value-type="date" office:date-value="2025-10-02T04:14:59.97121" calcext:value-type="date">
            <text:p>2025-10-02</text:p>
          </table:table-cell>
          <table:table-cell office:value-type="float" office:value="2460950.677083" calcext:value-type="float">
            <text:p>2460950.67708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1])" office:value-type="date" office:date-value="2025-10-02T18:15:24.48" calcext:value-type="date">
            <text:p>2025-10-02</text:p>
          </table:table-cell>
          <table:table-cell office:value-type="float" office:value="2460951.2607" calcext:value-type="float">
            <text:p>2460951.2607</text:p>
          </table:table-cell>
          <table:table-cell office:value-type="float" office:value="7.215" calcext:value-type="float">
            <text:p>7.21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2])" office:value-type="date" office:date-value="2025-10-03T21:51:59.90402" calcext:value-type="date">
            <text:p>2025-10-03</text:p>
          </table:table-cell>
          <table:table-cell office:value-type="float" office:value="2460952.41111" calcext:value-type="float">
            <text:p>2460952.4111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3])" office:value-type="date" office:date-value="2025-10-04T10:32:00.09599" calcext:value-type="date">
            <text:p>2025-10-04</text:p>
          </table:table-cell>
          <table:table-cell office:value-type="float" office:value="2460952.93889" calcext:value-type="float">
            <text:p>2460952.9388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4])" office:value-type="date" office:date-value="2025-10-04T17:10:00.19201" calcext:value-type="date">
            <text:p>2025-10-04</text:p>
          </table:table-cell>
          <table:table-cell office:value-type="float" office:value="2460953.21528" calcext:value-type="float">
            <text:p>2460953.2152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5])" office:value-type="date" office:date-value="2025-10-07T17:10:00.19201" calcext:value-type="date">
            <text:p>2025-10-07</text:p>
          </table:table-cell>
          <table:table-cell office:value-type="float" office:value="2460956.21528" calcext:value-type="float">
            <text:p>2460956.2152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6])" office:value-type="date" office:date-value="2025-10-08T17:10:00.19201" calcext:value-type="date">
            <text:p>2025-10-08</text:p>
          </table:table-cell>
          <table:table-cell office:value-type="float" office:value="2460957.21528" calcext:value-type="float">
            <text:p>2460957.2152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7])" office:value-type="date" office:date-value="2025-10-09T20:57:33.12001" calcext:value-type="date">
            <text:p>2025-10-09</text:p>
          </table:table-cell>
          <table:table-cell office:value-type="float" office:value="2460958.3733" calcext:value-type="float">
            <text:p>2460958.3733</text:p>
          </table:table-cell>
          <table:table-cell office:value-type="float" office:value="7.277" calcext:value-type="float">
            <text:p>7.27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8])" office:value-type="date" office:date-value="2025-10-11T02:05:00.38398" calcext:value-type="date">
            <text:p>2025-10-11</text:p>
          </table:table-cell>
          <table:table-cell office:value-type="float" office:value="2460959.58681" calcext:value-type="float">
            <text:p>2460959.5868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39])" office:value-type="date" office:date-value="2025-10-11T06:23:02.39999" calcext:value-type="date">
            <text:p>2025-10-11</text:p>
          </table:table-cell>
          <table:table-cell office:value-type="float" office:value="2460959.766" calcext:value-type="float">
            <text:p>2460959.76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0])" office:value-type="date" office:date-value="2025-10-13T19:02:47.04" calcext:value-type="date">
            <text:p>2025-10-13</text:p>
          </table:table-cell>
          <table:table-cell office:value-type="float" office:value="2460962.2936" calcext:value-type="float">
            <text:p>2460962.2936</text:p>
          </table:table-cell>
          <table:table-cell office:value-type="float" office:value="7.259" calcext:value-type="float">
            <text:p>7.25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1])" office:value-type="date" office:date-value="2025-10-15T11:05:59.99999" calcext:value-type="date">
            <text:p>2025-10-15</text:p>
          </table:table-cell>
          <table:table-cell office:value-type="float" office:value="2460963.9625" calcext:value-type="float">
            <text:p>2460963.962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2])" office:value-type="date" office:date-value="2025-10-15T17:10:00.19201" calcext:value-type="date">
            <text:p>2025-10-15</text:p>
          </table:table-cell>
          <table:table-cell office:value-type="float" office:value="2460964.21528" calcext:value-type="float">
            <text:p>2460964.2152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3])" office:value-type="date" office:date-value="2025-10-16T17:10:00.19201" calcext:value-type="date">
            <text:p>2025-10-16</text:p>
          </table:table-cell>
          <table:table-cell office:value-type="float" office:value="2460965.21528" calcext:value-type="float">
            <text:p>2460965.2152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4])" office:value-type="date" office:date-value="2025-10-17T17:10:00.19201" calcext:value-type="date">
            <text:p>2025-10-17</text:p>
          </table:table-cell>
          <table:table-cell office:value-type="float" office:value="2460966.21528" calcext:value-type="float">
            <text:p>2460966.2152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5])" office:value-type="date" office:date-value="2025-10-18T17:57:59.90401" calcext:value-type="date">
            <text:p>2025-10-18</text:p>
          </table:table-cell>
          <table:table-cell office:value-type="float" office:value="2460967.24861" calcext:value-type="float">
            <text:p>2460967.2486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6])" office:value-type="date" office:date-value="2025-10-18T18:14:41.27999" calcext:value-type="date">
            <text:p>2025-10-18</text:p>
          </table:table-cell>
          <table:table-cell office:value-type="float" office:value="2460967.2602" calcext:value-type="float">
            <text:p>2460967.2602</text:p>
          </table:table-cell>
          <table:table-cell office:value-type="float" office:value="7.212" calcext:value-type="float">
            <text:p>7.21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7])" office:value-type="date" office:date-value="2025-10-19T00:22:36.47999" calcext:value-type="date">
            <text:p>2025-10-19</text:p>
          </table:table-cell>
          <table:table-cell office:value-type="float" office:value="2460967.5157" calcext:value-type="float">
            <text:p>2460967.515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8])" office:value-type="date" office:date-value="2025-10-19T16:59:59.71198" calcext:value-type="date">
            <text:p>2025-10-19</text:p>
          </table:table-cell>
          <table:table-cell office:value-type="float" office:value="2460968.20833" calcext:value-type="float">
            <text:p>2460968.2083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49])" office:value-type="date" office:date-value="2025-10-20T04:54:00.28798" calcext:value-type="date">
            <text:p>2025-10-20</text:p>
          </table:table-cell>
          <table:table-cell office:value-type="float" office:value="2460968.70417" calcext:value-type="float">
            <text:p>2460968.70417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0])" office:value-type="date" office:date-value="2025-10-21T04:21:04.31998" calcext:value-type="date">
            <text:p>2025-10-21</text:p>
          </table:table-cell>
          <table:table-cell office:value-type="float" office:value="2460969.6813" calcext:value-type="float">
            <text:p>2460969.6813</text:p>
          </table:table-cell>
          <table:table-cell office:value-type="float" office:value="7.086" calcext:value-type="float">
            <text:p>7.08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1])" office:value-type="date" office:date-value="2025-10-21T04:53:02.39999" calcext:value-type="date">
            <text:p>2025-10-21</text:p>
          </table:table-cell>
          <table:table-cell office:value-type="float" office:value="2460969.7035" calcext:value-type="float">
            <text:p>2460969.703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2])" office:value-type="date" office:date-value="2025-10-24T18:22:01.92001" calcext:value-type="date">
            <text:p>2025-10-24</text:p>
          </table:table-cell>
          <table:table-cell office:value-type="float" office:value="2460973.2653" calcext:value-type="float">
            <text:p>2460973.2653</text:p>
          </table:table-cell>
          <table:table-cell office:value-type="float" office:value="7.195" calcext:value-type="float">
            <text:p>7.19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3])" office:value-type="date" office:date-value="2025-10-24T23:21:00.28801" calcext:value-type="date">
            <text:p>2025-10-24</text:p>
          </table:table-cell>
          <table:table-cell office:value-type="float" office:value="2460973.47292" calcext:value-type="float">
            <text:p>2460973.4729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 </text:p>
          </table:table-cell>
        </table:table-row>
        <table:table-row table:style-name="ro1">
          <table:table-cell table:formula="of:=COM.EXAMPLE.JULIANDATE.JULIANDATEIMPL.FROMJULIANDATE([.B154])" office:value-type="date" office:date-value="2025-10-25T00:47:59.712" calcext:value-type="date">
            <text:p>2025-10-25</text:p>
          </table:table-cell>
          <table:table-cell office:value-type="float" office:value="2460973.53333" calcext:value-type="float">
            <text:p>2460973.5333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5])" office:value-type="date" office:date-value="2025-10-28T02:08:00.09598" calcext:value-type="date">
            <text:p>2025-10-28</text:p>
          </table:table-cell>
          <table:table-cell office:value-type="float" office:value="2460976.58889" calcext:value-type="float">
            <text:p>2460976.5888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6])" office:value-type="date" office:date-value="2025-10-28T18:15:00.28802" calcext:value-type="date">
            <text:p>2025-10-28</text:p>
          </table:table-cell>
          <table:table-cell office:value-type="float" office:value="2460977.26042" calcext:value-type="float">
            <text:p>2460977.2604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 </text:p>
          </table:table-cell>
        </table:table-row>
        <table:table-row table:style-name="ro1">
          <table:table-cell table:formula="of:=COM.EXAMPLE.JULIANDATE.JULIANDATEIMPL.FROMJULIANDATE([.B157])" office:value-type="date" office:date-value="2025-11-01T01:38:00.384" calcext:value-type="date">
            <text:p>2025-11-01</text:p>
          </table:table-cell>
          <table:table-cell office:value-type="float" office:value="2460980.56806" calcext:value-type="float">
            <text:p>2460980.5680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8])" office:value-type="date" office:date-value="2025-11-01T19:26:24" calcext:value-type="date">
            <text:p>2025-11-01</text:p>
          </table:table-cell>
          <table:table-cell office:value-type="float" office:value="2460981.31" calcext:value-type="float">
            <text:p>2460981.3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59])" office:value-type="date" office:date-value="2025-11-02T11:28:00.19199" calcext:value-type="date">
            <text:p>2025-11-02</text:p>
          </table:table-cell>
          <table:table-cell office:value-type="float" office:value="2460981.97778" calcext:value-type="float">
            <text:p>2460981.9777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0])" office:value-type="date" office:date-value="2025-11-03T18:00:34.55998" calcext:value-type="date">
            <text:p>2025-11-03</text:p>
          </table:table-cell>
          <table:table-cell office:value-type="float" office:value="2460983.2504" calcext:value-type="float">
            <text:p>2460983.2504</text:p>
          </table:table-cell>
          <table:table-cell office:value-type="float" office:value="7.212" calcext:value-type="float">
            <text:p>7.21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1])" office:value-type="date" office:date-value="2025-11-04T03:51:00.28801" calcext:value-type="date">
            <text:p>2025-11-04</text:p>
          </table:table-cell>
          <table:table-cell office:value-type="float" office:value="2460983.66042" calcext:value-type="float">
            <text:p>2460983.66042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2])" office:value-type="date" office:date-value="2025-11-05T04:15:01.44" calcext:value-type="date">
            <text:p>2025-11-05</text:p>
          </table:table-cell>
          <table:table-cell office:value-type="float" office:value="2460984.6771" calcext:value-type="float">
            <text:p>2460984.677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3])" office:value-type="date" office:date-value="2025-11-06T17:00:05.75999" calcext:value-type="date">
            <text:p>2025-11-06</text:p>
          </table:table-cell>
          <table:table-cell office:value-type="float" office:value="2460986.2084" calcext:value-type="float">
            <text:p>2460986.2084</text:p>
          </table:table-cell>
          <table:table-cell office:value-type="float" office:value="7.218" calcext:value-type="float">
            <text:p>7.21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4])" office:value-type="date" office:date-value="2025-11-07T01:54:00.28798" calcext:value-type="date">
            <text:p>2025-11-07</text:p>
          </table:table-cell>
          <table:table-cell office:value-type="float" office:value="2460986.57917" calcext:value-type="float">
            <text:p>2460986.5791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5])" office:value-type="date" office:date-value="2025-11-08T23:55:49.43998" calcext:value-type="date">
            <text:p>2025-11-08</text:p>
          </table:table-cell>
          <table:table-cell office:value-type="float" office:value="2460988.4971" calcext:value-type="float">
            <text:p>2460988.497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6])" office:value-type="date" office:date-value="2025-11-12T01:07:59.80801" calcext:value-type="date">
            <text:p>2025-11-12</text:p>
          </table:table-cell>
          <table:table-cell office:value-type="float" office:value="2460991.54722" calcext:value-type="float">
            <text:p>2460991.5472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7])" office:value-type="date" office:date-value="2025-11-12T20:48:00.28799" calcext:value-type="date">
            <text:p>2025-11-12</text:p>
          </table:table-cell>
          <table:table-cell office:value-type="float" office:value="2460992.36667" calcext:value-type="float">
            <text:p>2460992.3666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8])" office:value-type="date" office:date-value="2025-11-13T17:27:44.63999" calcext:value-type="date">
            <text:p>2025-11-13</text:p>
          </table:table-cell>
          <table:table-cell office:value-type="float" office:value="2460993.2276" calcext:value-type="float">
            <text:p>2460993.2276</text:p>
          </table:table-cell>
          <table:table-cell office:value-type="float" office:value="7.318" calcext:value-type="float">
            <text:p>7.31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69])" office:value-type="date" office:date-value="2025-11-14T01:54:59.90399" calcext:value-type="date">
            <text:p>2025-11-14</text:p>
          </table:table-cell>
          <table:table-cell office:value-type="float" office:value="2460993.57986" calcext:value-type="float">
            <text:p>2460993.5798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0])" office:value-type="date" office:date-value="2025-11-14T02:35:57.12" calcext:value-type="date">
            <text:p>2025-11-14</text:p>
          </table:table-cell>
          <table:table-cell office:value-type="float" office:value="2460993.6083" calcext:value-type="float">
            <text:p>2460993.6083</text:p>
          </table:table-cell>
          <table:table-cell office:value-type="float" office:value="7.185" calcext:value-type="float">
            <text:p>7.18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1])" office:value-type="date" office:date-value="2025-11-14T22:07:00.19199" calcext:value-type="date">
            <text:p>2025-11-14</text:p>
          </table:table-cell>
          <table:table-cell office:value-type="float" office:value="2460994.42153" calcext:value-type="float">
            <text:p>2460994.4215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2])" office:value-type="date" office:date-value="2025-11-16T00:38:00.09598" calcext:value-type="date">
            <text:p>2025-11-16</text:p>
          </table:table-cell>
          <table:table-cell office:value-type="float" office:value="2460995.52639" calcext:value-type="float">
            <text:p>2460995.5263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3])" office:value-type="date" office:date-value="2025-11-16T19:20:38.39999" calcext:value-type="date">
            <text:p>2025-11-16</text:p>
          </table:table-cell>
          <table:table-cell office:value-type="float" office:value="2460996.306" calcext:value-type="float">
            <text:p>2460996.306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4])" office:value-type="date" office:date-value="2025-11-17T21:08:03.83998" calcext:value-type="date">
            <text:p>2025-11-17</text:p>
          </table:table-cell>
          <table:table-cell office:value-type="float" office:value="2460997.3806" calcext:value-type="float">
            <text:p>2460997.380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5])" office:value-type="date" office:date-value="2025-11-18T16:48:34.56" calcext:value-type="date">
            <text:p>2025-11-18</text:p>
          </table:table-cell>
          <table:table-cell office:value-type="float" office:value="2460998.2004" calcext:value-type="float">
            <text:p>2460998.2004</text:p>
          </table:table-cell>
          <table:table-cell office:value-type="float" office:value="7.311" calcext:value-type="float">
            <text:p>7.31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6])" office:value-type="date" office:date-value="2025-11-19T02:37:59.80801" calcext:value-type="date">
            <text:p>2025-11-19</text:p>
          </table:table-cell>
          <table:table-cell office:value-type="float" office:value="2460998.60972" calcext:value-type="float">
            <text:p>2460998.6097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7])" office:value-type="date" office:date-value="2025-11-19T17:05:00.38398" calcext:value-type="date">
            <text:p>2025-11-19</text:p>
          </table:table-cell>
          <table:table-cell office:value-type="float" office:value="2460999.21181" calcext:value-type="float">
            <text:p>2460999.21181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8])" office:value-type="date" office:date-value="2025-11-20T16:14:00.09601" calcext:value-type="date">
            <text:p>2025-11-20</text:p>
          </table:table-cell>
          <table:table-cell office:value-type="float" office:value="2461000.17639" calcext:value-type="float">
            <text:p>2461000.1763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79])" office:value-type="date" office:date-value="2025-11-21T17:48:28.80001" calcext:value-type="date">
            <text:p>2025-11-21</text:p>
          </table:table-cell>
          <table:table-cell office:value-type="float" office:value="2461001.242" calcext:value-type="float">
            <text:p>2461001.24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0])" office:value-type="date" office:date-value="2025-11-23T02:50:00.38398" calcext:value-type="date">
            <text:p>2025-11-23</text:p>
          </table:table-cell>
          <table:table-cell office:value-type="float" office:value="2461002.61806" calcext:value-type="float">
            <text:p>2461002.6180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1])" office:value-type="date" office:date-value="2025-11-23T04:12:59.9616" calcext:value-type="date">
            <text:p>2025-11-23</text:p>
          </table:table-cell>
          <table:table-cell office:value-type="float" office:value="2461002.675694" calcext:value-type="float">
            <text:p>2461002.67569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2])" office:value-type="date" office:date-value="2025-11-23T17:34:04.79999" calcext:value-type="date">
            <text:p>2025-11-23</text:p>
          </table:table-cell>
          <table:table-cell office:value-type="float" office:value="2461003.232" calcext:value-type="float">
            <text:p>2461003.232</text:p>
          </table:table-cell>
          <table:table-cell office:value-type="float" office:value="7.315" calcext:value-type="float">
            <text:p>7.31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3])" office:value-type="date" office:date-value="2025-11-26T17:12:59.90401" calcext:value-type="date">
            <text:p>2025-11-26</text:p>
          </table:table-cell>
          <table:table-cell office:value-type="float" office:value="2461006.21736" calcext:value-type="float">
            <text:p>2461006.21736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4])" office:value-type="date" office:date-value="2025-11-26T18:04:19.2" calcext:value-type="date">
            <text:p>2025-11-26</text:p>
          </table:table-cell>
          <table:table-cell office:value-type="float" office:value="2461006.253" calcext:value-type="float">
            <text:p>2461006.253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5])" office:value-type="date" office:date-value="2025-11-26T23:39:00.0288" calcext:value-type="date">
            <text:p>2025-11-26</text:p>
          </table:table-cell>
          <table:table-cell office:value-type="float" office:value="2461006.485417" calcext:value-type="float">
            <text:p>2461006.48541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6])" office:value-type="date" office:date-value="2025-11-27T01:30:00" calcext:value-type="date">
            <text:p>2025-11-27</text:p>
          </table:table-cell>
          <table:table-cell office:value-type="float" office:value="2461006.5625" calcext:value-type="float">
            <text:p>2461006.562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7])" office:value-type="date" office:date-value="2025-11-27T19:02:21.12" calcext:value-type="date">
            <text:p>2025-11-27</text:p>
          </table:table-cell>
          <table:table-cell office:value-type="float" office:value="2461007.2933" calcext:value-type="float">
            <text:p>2461007.2933</text:p>
          </table:table-cell>
          <table:table-cell office:value-type="float" office:value="7.258" calcext:value-type="float">
            <text:p>7.25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8])" office:value-type="date" office:date-value="2025-11-29T17:02:24" calcext:value-type="date">
            <text:p>2025-11-29</text:p>
          </table:table-cell>
          <table:table-cell office:value-type="float" office:value="2461009.21" calcext:value-type="float">
            <text:p>2461009.2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89])" office:value-type="date" office:date-value="2025-12-03T01:03:00.00002" calcext:value-type="date">
            <text:p>2025-12-03</text:p>
          </table:table-cell>
          <table:table-cell office:value-type="float" office:value="2461012.54375" calcext:value-type="float">
            <text:p>2461012.5437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0])" office:value-type="date" office:date-value="2025-12-07T00:38:00.09598" calcext:value-type="date">
            <text:p>2025-12-07</text:p>
          </table:table-cell>
          <table:table-cell office:value-type="float" office:value="2461016.52639" calcext:value-type="float">
            <text:p>2461016.5263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1])" office:value-type="date" office:date-value="2025-12-09T17:26:00.096" calcext:value-type="date">
            <text:p>2025-12-09</text:p>
          </table:table-cell>
          <table:table-cell office:value-type="float" office:value="2461019.22639" calcext:value-type="float">
            <text:p>2461019.2263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2])" office:value-type="date" office:date-value="2025-12-09T19:30:00" calcext:value-type="date">
            <text:p>2025-12-09</text:p>
          </table:table-cell>
          <table:table-cell office:value-type="float" office:value="2461019.3125" calcext:value-type="float">
            <text:p>2461019.312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3])" office:value-type="date" office:date-value="2025-12-10T01:03:59.61599" calcext:value-type="date">
            <text:p>2025-12-10</text:p>
          </table:table-cell>
          <table:table-cell office:value-type="float" office:value="2461019.54444" calcext:value-type="float">
            <text:p>2461019.5444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4])" office:value-type="date" office:date-value="2025-12-10T17:53:13.92001" calcext:value-type="date">
            <text:p>2025-12-10</text:p>
          </table:table-cell>
          <table:table-cell office:value-type="float" office:value="2461020.2453" calcext:value-type="float">
            <text:p>2461020.2453</text:p>
          </table:table-cell>
          <table:table-cell office:value-type="float" office:value="7.271" calcext:value-type="float">
            <text:p>7.27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5])" office:value-type="date" office:date-value="2025-12-10T17:55:32.16001" calcext:value-type="date">
            <text:p>2025-12-10</text:p>
          </table:table-cell>
          <table:table-cell office:value-type="float" office:value="2461020.2469" calcext:value-type="float">
            <text:p>2461020.2469</text:p>
          </table:table-cell>
          <table:table-cell office:value-type="float" office:value="7.265" calcext:value-type="float">
            <text:p>7.26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6])" office:value-type="date" office:date-value="2025-12-10T17:57:07.20001" calcext:value-type="date">
            <text:p>2025-12-10</text:p>
          </table:table-cell>
          <table:table-cell office:value-type="float" office:value="2461020.248" calcext:value-type="float">
            <text:p>2461020.248</text:p>
          </table:table-cell>
          <table:table-cell office:value-type="float" office:value="7.268" calcext:value-type="float">
            <text:p>7.26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7])" office:value-type="date" office:date-value="2025-12-10T19:30:00" calcext:value-type="date">
            <text:p>2025-12-10</text:p>
          </table:table-cell>
          <table:table-cell office:value-type="float" office:value="2461020.3125" calcext:value-type="float">
            <text:p>2461020.312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8])" office:value-type="date" office:date-value="2025-12-12T01:39:59.61602" calcext:value-type="date">
            <text:p>2025-12-12</text:p>
          </table:table-cell>
          <table:table-cell office:value-type="float" office:value="2461021.56944" calcext:value-type="float">
            <text:p>2461021.569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199])" office:value-type="date" office:date-value="2025-12-13T16:41:05.28" calcext:value-type="date">
            <text:p>2025-12-13</text:p>
          </table:table-cell>
          <table:table-cell office:value-type="float" office:value="2461023.1952" calcext:value-type="float">
            <text:p>2461023.1952</text:p>
          </table:table-cell>
          <table:table-cell office:value-type="float" office:value="7.402" calcext:value-type="float">
            <text:p>7.40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0])" office:value-type="date" office:date-value="2025-12-13T17:05:16.79998" calcext:value-type="date">
            <text:p>2025-12-13</text:p>
          </table:table-cell>
          <table:table-cell office:value-type="float" office:value="2461023.212" calcext:value-type="float">
            <text:p>2461023.21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1])" office:value-type="date" office:date-value="2025-12-13T19:25:58.08001" calcext:value-type="date">
            <text:p>2025-12-13</text:p>
          </table:table-cell>
          <table:table-cell office:value-type="float" office:value="2461023.3097" calcext:value-type="float">
            <text:p>2461023.309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2])" office:value-type="date" office:date-value="2025-12-14T11:59:00.38399" calcext:value-type="date">
            <text:p>2025-12-14</text:p>
          </table:table-cell>
          <table:table-cell office:value-type="float" office:value="2461023.99931" calcext:value-type="float">
            <text:p>2461023.9993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3])" office:value-type="date" office:date-value="2025-12-14T18:24:59.90399" calcext:value-type="date">
            <text:p>2025-12-14</text:p>
          </table:table-cell>
          <table:table-cell office:value-type="float" office:value="2461024.26736" calcext:value-type="float">
            <text:p>2461024.2673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4])" office:value-type="date" office:date-value="2025-12-14T21:00:00" calcext:value-type="date">
            <text:p>2025-12-14</text:p>
          </table:table-cell>
          <table:table-cell office:value-type="float" office:value="2461024.375" calcext:value-type="float">
            <text:p>2461024.375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5])" office:value-type="date" office:date-value="2025-12-15T02:01:59.80801" calcext:value-type="date">
            <text:p>2025-12-15</text:p>
          </table:table-cell>
          <table:table-cell office:value-type="float" office:value="2461024.58472" calcext:value-type="float">
            <text:p>2461024.5847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6])" office:value-type="date" office:date-value="2025-12-15T20:50:00.38398" calcext:value-type="date">
            <text:p>2025-12-15</text:p>
          </table:table-cell>
          <table:table-cell office:value-type="float" office:value="2461025.36806" calcext:value-type="float">
            <text:p>2461025.3680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7])" office:value-type="date" office:date-value="2025-12-16T19:56:03.84" calcext:value-type="date">
            <text:p>2025-12-16</text:p>
          </table:table-cell>
          <table:table-cell office:value-type="float" office:value="2461026.3306" calcext:value-type="float">
            <text:p>2461026.330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8])" office:value-type="date" office:date-value="2025-12-16T21:26:59.99998" calcext:value-type="date">
            <text:p>2025-12-16</text:p>
          </table:table-cell>
          <table:table-cell office:value-type="float" office:value="2461026.39375" calcext:value-type="float">
            <text:p>2461026.39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09])" office:value-type="date" office:date-value="2025-12-18T16:58:22.08001" calcext:value-type="date">
            <text:p>2025-12-18</text:p>
          </table:table-cell>
          <table:table-cell office:value-type="float" office:value="2461028.2072" calcext:value-type="float">
            <text:p>2461028.2072</text:p>
          </table:table-cell>
          <table:table-cell office:value-type="float" office:value="7.404" calcext:value-type="float">
            <text:p>7.40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0])" office:value-type="date" office:date-value="2025-12-19T01:48:59.61599" calcext:value-type="date">
            <text:p>2025-12-19</text:p>
          </table:table-cell>
          <table:table-cell office:value-type="float" office:value="2461028.57569" calcext:value-type="float">
            <text:p>2461028.5756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1])" office:value-type="date" office:date-value="2025-12-19T23:48:28.80001" calcext:value-type="date">
            <text:p>2025-12-19</text:p>
          </table:table-cell>
          <table:table-cell office:value-type="float" office:value="2461029.492" calcext:value-type="float">
            <text:p>2461029.49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2])" office:value-type="date" office:date-value="2025-12-20T00:45:00" calcext:value-type="date">
            <text:p>2025-12-20</text:p>
          </table:table-cell>
          <table:table-cell office:value-type="float" office:value="2461029.53125" calcext:value-type="float">
            <text:p>2461029.531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3])" office:value-type="date" office:date-value="2025-12-23T19:37:03.36001" calcext:value-type="date">
            <text:p>2025-12-23</text:p>
          </table:table-cell>
          <table:table-cell office:value-type="float" office:value="2461033.3174" calcext:value-type="float">
            <text:p>2461033.317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4])" office:value-type="date" office:date-value="2025-12-24T19:30:00" calcext:value-type="date">
            <text:p>2025-12-24</text:p>
          </table:table-cell>
          <table:table-cell office:value-type="float" office:value="2461034.3125" calcext:value-type="float">
            <text:p>2461034.312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5])" office:value-type="date" office:date-value="2025-12-25T11:14:00.38399" calcext:value-type="date">
            <text:p>2025-12-25</text:p>
          </table:table-cell>
          <table:table-cell office:value-type="float" office:value="2461034.96806" calcext:value-type="float">
            <text:p>2461034.9680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6])" office:value-type="date" office:date-value="2025-12-26T16:39:04.32" calcext:value-type="date">
            <text:p>2025-12-26</text:p>
          </table:table-cell>
          <table:table-cell office:value-type="float" office:value="2461036.1938" calcext:value-type="float">
            <text:p>2461036.1938</text:p>
          </table:table-cell>
          <table:table-cell office:value-type="float" office:value="7.422" calcext:value-type="float">
            <text:p>7.42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7])" office:value-type="date" office:date-value="2025-12-26T18:51:59.04001" calcext:value-type="date">
            <text:p>2025-12-26</text:p>
          </table:table-cell>
          <table:table-cell office:value-type="float" office:value="2461036.2861" calcext:value-type="float">
            <text:p>2461036.286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8])" office:value-type="date" office:date-value="2025-12-26T20:34:04.79999" calcext:value-type="date">
            <text:p>2025-12-26</text:p>
          </table:table-cell>
          <table:table-cell office:value-type="float" office:value="2461036.357" calcext:value-type="float">
            <text:p>2461036.357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19])" office:value-type="date" office:date-value="2025-12-27T18:51:59.04001" calcext:value-type="date">
            <text:p>2025-12-27</text:p>
          </table:table-cell>
          <table:table-cell office:value-type="float" office:value="2461037.2861" calcext:value-type="float">
            <text:p>2461037.286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0])" office:value-type="date" office:date-value="2025-12-27T21:18:59.61599" calcext:value-type="date">
            <text:p>2025-12-27</text:p>
          </table:table-cell>
          <table:table-cell office:value-type="float" office:value="2461037.38819" calcext:value-type="float">
            <text:p>2461037.3881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1])" office:value-type="date" office:date-value="2025-12-28T01:59:59.71198" calcext:value-type="date">
            <text:p>2025-12-28</text:p>
          </table:table-cell>
          <table:table-cell office:value-type="float" office:value="2461037.58333" calcext:value-type="float">
            <text:p>2461037.58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2])" office:value-type="date" office:date-value="2025-12-28T16:47:51.35999" calcext:value-type="date">
            <text:p>2025-12-28</text:p>
          </table:table-cell>
          <table:table-cell office:value-type="float" office:value="2461038.1999" calcext:value-type="float">
            <text:p>2461038.1999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3])" office:value-type="date" office:date-value="2025-12-28T18:39:01.44001" calcext:value-type="date">
            <text:p>2025-12-28</text:p>
          </table:table-cell>
          <table:table-cell office:value-type="float" office:value="2461038.2771" calcext:value-type="float">
            <text:p>2461038.277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4])" office:value-type="date" office:date-value="2025-12-29T18:49:58.08002" calcext:value-type="date">
            <text:p>2025-12-29</text:p>
          </table:table-cell>
          <table:table-cell office:value-type="float" office:value="2461039.2847" calcext:value-type="float">
            <text:p>2461039.284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5])" office:value-type="date" office:date-value="2026-01-02T19:09:07.2" calcext:value-type="date">
            <text:p>2026-01-02</text:p>
          </table:table-cell>
          <table:table-cell office:value-type="float" office:value="2461043.298" calcext:value-type="float">
            <text:p>2461043.298</text:p>
          </table:table-cell>
          <table:table-cell office:value-type="float" office:value="7.361" calcext:value-type="float">
            <text:p>7.36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6])" office:value-type="date" office:date-value="2026-01-04T02:44:59.71198" calcext:value-type="date">
            <text:p>2026-01-04</text:p>
          </table:table-cell>
          <table:table-cell office:value-type="float" office:value="2461044.61458" calcext:value-type="float">
            <text:p>2461044.6145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7])" office:value-type="date" office:date-value="2026-01-04T16:42:48.95998" calcext:value-type="date">
            <text:p>2026-01-04</text:p>
          </table:table-cell>
          <table:table-cell office:value-type="float" office:value="2461045.1964" calcext:value-type="float">
            <text:p>2461045.1964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8])" office:value-type="date" office:date-value="2026-01-09T20:52:48.00001" calcext:value-type="date">
            <text:p>2026-01-09</text:p>
          </table:table-cell>
          <table:table-cell office:value-type="float" office:value="2461050.37" calcext:value-type="float">
            <text:p>2461050.3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29])" office:value-type="date" office:date-value="2026-01-11T02:05:00.38398" calcext:value-type="date">
            <text:p>2026-01-11</text:p>
          </table:table-cell>
          <table:table-cell office:value-type="float" office:value="2461051.58681" calcext:value-type="float">
            <text:p>2461051.5868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0])" office:value-type="date" office:date-value="2026-01-11T05:38:25.728" calcext:value-type="date">
            <text:p>2026-01-11</text:p>
          </table:table-cell>
          <table:table-cell office:value-type="float" office:value="2461051.73502" calcext:value-type="float">
            <text:p>2461051.73502</text:p>
          </table:table-cell>
          <table:table-cell office:value-type="float" office:value="5.3221" calcext:value-type="float">
            <text:p>5.322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1])" office:value-type="date" office:date-value="2026-01-11T05:47:45.6" calcext:value-type="date">
            <text:p>2026-01-11</text:p>
          </table:table-cell>
          <table:table-cell office:value-type="float" office:value="2461051.7415" calcext:value-type="float">
            <text:p>2461051.7415</text:p>
          </table:table-cell>
          <table:table-cell office:value-type="float" office:value="6.7526" calcext:value-type="float">
            <text:p>6.752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2])" office:value-type="date" office:date-value="2026-01-11T06:01:15.16801" calcext:value-type="date">
            <text:p>2026-01-11</text:p>
          </table:table-cell>
          <table:table-cell office:value-type="float" office:value="2461051.75087" calcext:value-type="float">
            <text:p>2461051.75087</text:p>
          </table:table-cell>
          <table:table-cell office:value-type="float" office:value="7.3981" calcext:value-type="float">
            <text:p>7.398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3])" office:value-type="date" office:date-value="2026-01-12T03:46:42.81602" calcext:value-type="date">
            <text:p>2026-01-12</text:p>
          </table:table-cell>
          <table:table-cell office:value-type="float" office:value="2461052.65744" calcext:value-type="float">
            <text:p>2461052.65744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4])" office:value-type="date" office:date-value="2026-01-12T03:49:50.304" calcext:value-type="date">
            <text:p>2026-01-12</text:p>
          </table:table-cell>
          <table:table-cell office:value-type="float" office:value="2461052.65961" calcext:value-type="float">
            <text:p>2461052.65961</text:p>
          </table:table-cell>
          <table:table-cell office:value-type="float" office:value="7.252" calcext:value-type="float">
            <text:p>7.25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5])" office:value-type="date" office:date-value="2026-01-12T03:52:56.92801" calcext:value-type="date">
            <text:p>2026-01-12</text:p>
          </table:table-cell>
          <table:table-cell office:value-type="float" office:value="2461052.66177" calcext:value-type="float">
            <text:p>2461052.66177</text:p>
          </table:table-cell>
          <table:table-cell office:value-type="float" office:value="7.204" calcext:value-type="float">
            <text:p>7.20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6])" office:value-type="date" office:date-value="2026-01-12T03:56:04.41599" calcext:value-type="date">
            <text:p>2026-01-12</text:p>
          </table:table-cell>
          <table:table-cell office:value-type="float" office:value="2461052.66394" calcext:value-type="float">
            <text:p>2461052.66394</text:p>
          </table:table-cell>
          <table:table-cell office:value-type="float" office:value="7.255" calcext:value-type="float">
            <text:p>7.25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7])" office:value-type="date" office:date-value="2026-01-12T03:59:11.04" calcext:value-type="date">
            <text:p>2026-01-12</text:p>
          </table:table-cell>
          <table:table-cell office:value-type="float" office:value="2461052.6661" calcext:value-type="float">
            <text:p>2461052.6661</text:p>
          </table:table-cell>
          <table:table-cell office:value-type="float" office:value="7.236" calcext:value-type="float">
            <text:p>7.23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8])" office:value-type="date" office:date-value="2026-01-12T04:02:18.52798" calcext:value-type="date">
            <text:p>2026-01-12</text:p>
          </table:table-cell>
          <table:table-cell office:value-type="float" office:value="2461052.66827" calcext:value-type="float">
            <text:p>2461052.66827</text:p>
          </table:table-cell>
          <table:table-cell office:value-type="float" office:value="7.199" calcext:value-type="float">
            <text:p>7.19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39])" office:value-type="date" office:date-value="2026-01-12T04:05:25.15199" calcext:value-type="date">
            <text:p>2026-01-12</text:p>
          </table:table-cell>
          <table:table-cell office:value-type="float" office:value="2461052.67043" calcext:value-type="float">
            <text:p>2461052.67043</text:p>
          </table:table-cell>
          <table:table-cell office:value-type="float" office:value="7.243" calcext:value-type="float">
            <text:p>7.24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0])" office:value-type="date" office:date-value="2026-01-12T04:08:31.77601" calcext:value-type="date">
            <text:p>2026-01-12</text:p>
          </table:table-cell>
          <table:table-cell office:value-type="float" office:value="2461052.67259" calcext:value-type="float">
            <text:p>2461052.67259</text:p>
          </table:table-cell>
          <table:table-cell office:value-type="float" office:value="7.211" calcext:value-type="float">
            <text:p>7.21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1])" office:value-type="date" office:date-value="2026-01-12T04:11:38.39998" calcext:value-type="date">
            <text:p>2026-01-12</text:p>
          </table:table-cell>
          <table:table-cell office:value-type="float" office:value="2461052.67475" calcext:value-type="float">
            <text:p>2461052.67475</text:p>
          </table:table-cell>
          <table:table-cell office:value-type="float" office:value="7.226" calcext:value-type="float">
            <text:p>7.22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2])" office:value-type="date" office:date-value="2026-01-12T04:14:45.888" calcext:value-type="date">
            <text:p>2026-01-12</text:p>
          </table:table-cell>
          <table:table-cell office:value-type="float" office:value="2461052.67692" calcext:value-type="float">
            <text:p>2461052.67692</text:p>
          </table:table-cell>
          <table:table-cell office:value-type="float" office:value="7.279" calcext:value-type="float">
            <text:p>7.27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3])" office:value-type="date" office:date-value="2026-01-12T04:17:52.51201" calcext:value-type="date">
            <text:p>2026-01-12</text:p>
          </table:table-cell>
          <table:table-cell office:value-type="float" office:value="2461052.67908" calcext:value-type="float">
            <text:p>2461052.67908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4])" office:value-type="date" office:date-value="2026-01-12T04:20:59.99999" calcext:value-type="date">
            <text:p>2026-01-12</text:p>
          </table:table-cell>
          <table:table-cell office:value-type="float" office:value="2461052.68125" calcext:value-type="float">
            <text:p>2461052.68125</text:p>
          </table:table-cell>
          <table:table-cell office:value-type="float" office:value="7.253" calcext:value-type="float">
            <text:p>7.25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5])" office:value-type="date" office:date-value="2026-01-12T04:24:06.624" calcext:value-type="date">
            <text:p>2026-01-12</text:p>
          </table:table-cell>
          <table:table-cell office:value-type="float" office:value="2461052.68341" calcext:value-type="float">
            <text:p>2461052.68341</text:p>
          </table:table-cell>
          <table:table-cell office:value-type="float" office:value="7.223" calcext:value-type="float">
            <text:p>7.22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6])" office:value-type="date" office:date-value="2026-01-12T04:27:14.11198" calcext:value-type="date">
            <text:p>2026-01-12</text:p>
          </table:table-cell>
          <table:table-cell office:value-type="float" office:value="2461052.68558" calcext:value-type="float">
            <text:p>2461052.68558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7])" office:value-type="date" office:date-value="2026-01-12T04:30:20.736" calcext:value-type="date">
            <text:p>2026-01-12</text:p>
          </table:table-cell>
          <table:table-cell office:value-type="float" office:value="2461052.68774" calcext:value-type="float">
            <text:p>2461052.68774</text:p>
          </table:table-cell>
          <table:table-cell office:value-type="float" office:value="7.248" calcext:value-type="float">
            <text:p>7.24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8])" office:value-type="date" office:date-value="2026-01-12T05:14:08.16001" calcext:value-type="date">
            <text:p>2026-01-12</text:p>
          </table:table-cell>
          <table:table-cell office:value-type="float" office:value="2461052.71815" calcext:value-type="float">
            <text:p>2461052.71815</text:p>
          </table:table-cell>
          <table:table-cell office:value-type="float" office:value="5.4348" calcext:value-type="float">
            <text:p>5.434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49])" office:value-type="date" office:date-value="2026-01-12T05:21:52.128" calcext:value-type="date">
            <text:p>2026-01-12</text:p>
          </table:table-cell>
          <table:table-cell office:value-type="float" office:value="2461052.72352" calcext:value-type="float">
            <text:p>2461052.72352</text:p>
          </table:table-cell>
          <table:table-cell office:value-type="float" office:value="6.7919" calcext:value-type="float">
            <text:p>6.791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0])" office:value-type="date" office:date-value="2026-01-12T05:33:31.10401" calcext:value-type="date">
            <text:p>2026-01-12</text:p>
          </table:table-cell>
          <table:table-cell office:value-type="float" office:value="2461052.73161" calcext:value-type="float">
            <text:p>2461052.73161</text:p>
          </table:table-cell>
          <table:table-cell office:value-type="float" office:value="7.489" calcext:value-type="float">
            <text:p>7.48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1])" office:value-type="date" office:date-value="2026-01-13T04:37:43.96799" calcext:value-type="date">
            <text:p>2026-01-13</text:p>
          </table:table-cell>
          <table:table-cell office:value-type="float" office:value="2461053.69287" calcext:value-type="float">
            <text:p>2461053.69287</text:p>
          </table:table-cell>
          <table:table-cell office:value-type="float" office:value="5.216" calcext:value-type="float">
            <text:p>5.21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2])" office:value-type="date" office:date-value="2026-01-13T04:45:31.39201" calcext:value-type="date">
            <text:p>2026-01-13</text:p>
          </table:table-cell>
          <table:table-cell office:value-type="float" office:value="2461053.69828" calcext:value-type="float">
            <text:p>2461053.69828</text:p>
          </table:table-cell>
          <table:table-cell office:value-type="float" office:value="6.6249" calcext:value-type="float">
            <text:p>6.624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3])" office:value-type="date" office:date-value="2026-01-13T04:57:14.68802" calcext:value-type="date">
            <text:p>2026-01-13</text:p>
          </table:table-cell>
          <table:table-cell office:value-type="float" office:value="2461053.70642" calcext:value-type="float">
            <text:p>2461053.70642</text:p>
          </table:table-cell>
          <table:table-cell office:value-type="float" office:value="7.3504" calcext:value-type="float">
            <text:p>7.350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4])" office:value-type="date" office:date-value="2026-01-15T03:22:59.80801" calcext:value-type="date">
            <text:p>2026-01-15</text:p>
          </table:table-cell>
          <table:table-cell office:value-type="float" office:value="2461055.64097" calcext:value-type="float">
            <text:p>2461055.6409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5])" office:value-type="date" office:date-value="2026-01-15T04:28:53.47202" calcext:value-type="date">
            <text:p>2026-01-15</text:p>
          </table:table-cell>
          <table:table-cell office:value-type="float" office:value="2461055.68673" calcext:value-type="float">
            <text:p>2461055.68673</text:p>
          </table:table-cell>
          <table:table-cell office:value-type="float" office:value="5.5031" calcext:value-type="float">
            <text:p>5.503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6])" office:value-type="date" office:date-value="2026-01-15T04:36:19.29599" calcext:value-type="date">
            <text:p>2026-01-15</text:p>
          </table:table-cell>
          <table:table-cell office:value-type="float" office:value="2461055.69189" calcext:value-type="float">
            <text:p>2461055.69189</text:p>
          </table:table-cell>
          <table:table-cell office:value-type="float" office:value="7.0231" calcext:value-type="float">
            <text:p>7.023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7])" office:value-type="date" office:date-value="2026-01-15T04:48:25.05601" calcext:value-type="date">
            <text:p>2026-01-15</text:p>
          </table:table-cell>
          <table:table-cell office:value-type="float" office:value="2461055.70029" calcext:value-type="float">
            <text:p>2461055.70029</text:p>
          </table:table-cell>
          <table:table-cell office:value-type="float" office:value="7.7137" calcext:value-type="float">
            <text:p>7.713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8])" office:value-type="date" office:date-value="2026-01-17T19:37:03.36001" calcext:value-type="date">
            <text:p>2026-01-17</text:p>
          </table:table-cell>
          <table:table-cell office:value-type="float" office:value="2461058.3174" calcext:value-type="float">
            <text:p>2461058.317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59])" office:value-type="date" office:date-value="2026-01-18T01:59:12.19198" calcext:value-type="date">
            <text:p>2026-01-18</text:p>
          </table:table-cell>
          <table:table-cell office:value-type="float" office:value="2461058.58278" calcext:value-type="float">
            <text:p>2461058.58278</text:p>
          </table:table-cell>
          <table:table-cell office:value-type="float" office:value="7.249" calcext:value-type="float">
            <text:p>7.24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0])" office:value-type="date" office:date-value="2026-01-18T02:00:45.50401" calcext:value-type="date">
            <text:p>2026-01-18</text:p>
          </table:table-cell>
          <table:table-cell office:value-type="float" office:value="2461058.58386" calcext:value-type="float">
            <text:p>2461058.58386</text:p>
          </table:table-cell>
          <table:table-cell office:value-type="float" office:value="8.788" calcext:value-type="float">
            <text:p>8.78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1])" office:value-type="date" office:date-value="2026-01-18T02:02:18.816" calcext:value-type="date">
            <text:p>2026-01-18</text:p>
          </table:table-cell>
          <table:table-cell office:value-type="float" office:value="2461058.58494" calcext:value-type="float">
            <text:p>2461058.58494</text:p>
          </table:table-cell>
          <table:table-cell office:value-type="float" office:value="7.277" calcext:value-type="float">
            <text:p>7.27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2])" office:value-type="date" office:date-value="2026-01-18T02:03:52.99199" calcext:value-type="date">
            <text:p>2026-01-18</text:p>
          </table:table-cell>
          <table:table-cell office:value-type="float" office:value="2461058.58603" calcext:value-type="float">
            <text:p>2461058.58603</text:p>
          </table:table-cell>
          <table:table-cell office:value-type="float" office:value="8.776" calcext:value-type="float">
            <text:p>8.77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3])" office:value-type="date" office:date-value="2026-01-18T02:05:26.30402" calcext:value-type="date">
            <text:p>2026-01-18</text:p>
          </table:table-cell>
          <table:table-cell office:value-type="float" office:value="2461058.58711" calcext:value-type="float">
            <text:p>2461058.58711</text:p>
          </table:table-cell>
          <table:table-cell office:value-type="float" office:value="7.263" calcext:value-type="float">
            <text:p>7.26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4])" office:value-type="date" office:date-value="2026-01-18T02:06:59.616" calcext:value-type="date">
            <text:p>2026-01-18</text:p>
          </table:table-cell>
          <table:table-cell office:value-type="float" office:value="2461058.58819" calcext:value-type="float">
            <text:p>2461058.58819</text:p>
          </table:table-cell>
          <table:table-cell office:value-type="float" office:value="8.773" calcext:value-type="float">
            <text:p>8.77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5])" office:value-type="date" office:date-value="2026-01-18T02:08:33.792" calcext:value-type="date">
            <text:p>2026-01-18</text:p>
          </table:table-cell>
          <table:table-cell office:value-type="float" office:value="2461058.58928" calcext:value-type="float">
            <text:p>2461058.58928</text:p>
          </table:table-cell>
          <table:table-cell office:value-type="float" office:value="7.222" calcext:value-type="float">
            <text:p>7.22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6])" office:value-type="date" office:date-value="2026-01-18T02:10:07.10398" calcext:value-type="date">
            <text:p>2026-01-18</text:p>
          </table:table-cell>
          <table:table-cell office:value-type="float" office:value="2461058.59036" calcext:value-type="float">
            <text:p>2461058.59036</text:p>
          </table:table-cell>
          <table:table-cell office:value-type="float" office:value="8.784" calcext:value-type="float">
            <text:p>8.78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7])" office:value-type="date" office:date-value="2026-01-18T02:11:40.41601" calcext:value-type="date">
            <text:p>2026-01-18</text:p>
          </table:table-cell>
          <table:table-cell office:value-type="float" office:value="2461058.59144" calcext:value-type="float">
            <text:p>2461058.59144</text:p>
          </table:table-cell>
          <table:table-cell office:value-type="float" office:value="7.253" calcext:value-type="float">
            <text:p>7.25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8])" office:value-type="date" office:date-value="2026-01-18T02:13:13.728" calcext:value-type="date">
            <text:p>2026-01-18</text:p>
          </table:table-cell>
          <table:table-cell office:value-type="float" office:value="2461058.59252" calcext:value-type="float">
            <text:p>2461058.59252</text:p>
          </table:table-cell>
          <table:table-cell office:value-type="float" office:value="8.773" calcext:value-type="float">
            <text:p>8.77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69])" office:value-type="date" office:date-value="2026-01-18T02:14:47.90399" calcext:value-type="date">
            <text:p>2026-01-18</text:p>
          </table:table-cell>
          <table:table-cell office:value-type="float" office:value="2461058.59361" calcext:value-type="float">
            <text:p>2461058.59361</text:p>
          </table:table-cell>
          <table:table-cell office:value-type="float" office:value="7.281" calcext:value-type="float">
            <text:p>7.28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0])" office:value-type="date" office:date-value="2026-01-18T02:16:21.21601" calcext:value-type="date">
            <text:p>2026-01-18</text:p>
          </table:table-cell>
          <table:table-cell office:value-type="float" office:value="2461058.59469" calcext:value-type="float">
            <text:p>2461058.59469</text:p>
          </table:table-cell>
          <table:table-cell office:value-type="float" office:value="8.799" calcext:value-type="float">
            <text:p>8.79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1])" office:value-type="date" office:date-value="2026-01-18T02:17:54.528" calcext:value-type="date">
            <text:p>2026-01-18</text:p>
          </table:table-cell>
          <table:table-cell office:value-type="float" office:value="2461058.59577" calcext:value-type="float">
            <text:p>2461058.59577</text:p>
          </table:table-cell>
          <table:table-cell office:value-type="float" office:value="7.223" calcext:value-type="float">
            <text:p>7.22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2])" office:value-type="date" office:date-value="2026-01-18T02:19:27.83999" calcext:value-type="date">
            <text:p>2026-01-18</text:p>
          </table:table-cell>
          <table:table-cell office:value-type="float" office:value="2461058.59685" calcext:value-type="float">
            <text:p>2461058.59685</text:p>
          </table:table-cell>
          <table:table-cell office:value-type="float" office:value="8.778" calcext:value-type="float">
            <text:p>8.77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3])" office:value-type="date" office:date-value="2026-01-18T02:21:01.15201" calcext:value-type="date">
            <text:p>2026-01-18</text:p>
          </table:table-cell>
          <table:table-cell office:value-type="float" office:value="2461058.59793" calcext:value-type="float">
            <text:p>2461058.59793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4])" office:value-type="date" office:date-value="2026-01-18T02:22:35.32801" calcext:value-type="date">
            <text:p>2026-01-18</text:p>
          </table:table-cell>
          <table:table-cell office:value-type="float" office:value="2461058.59902" calcext:value-type="float">
            <text:p>2461058.59902</text:p>
          </table:table-cell>
          <table:table-cell office:value-type="float" office:value="8.787" calcext:value-type="float">
            <text:p>8.78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5])" office:value-type="date" office:date-value="2026-01-18T02:24:08.63999" calcext:value-type="date">
            <text:p>2026-01-18</text:p>
          </table:table-cell>
          <table:table-cell office:value-type="float" office:value="2461058.6001" calcext:value-type="float">
            <text:p>2461058.6001</text:p>
          </table:table-cell>
          <table:table-cell office:value-type="float" office:value="7.263" calcext:value-type="float">
            <text:p>7.26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6])" office:value-type="date" office:date-value="2026-01-18T02:25:41.95202" calcext:value-type="date">
            <text:p>2026-01-18</text:p>
          </table:table-cell>
          <table:table-cell office:value-type="float" office:value="2461058.60118" calcext:value-type="float">
            <text:p>2461058.60118</text:p>
          </table:table-cell>
          <table:table-cell office:value-type="float" office:value="8.765" calcext:value-type="float">
            <text:p>8.76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7])" office:value-type="date" office:date-value="2026-01-18T02:27:16.12801" calcext:value-type="date">
            <text:p>2026-01-18</text:p>
          </table:table-cell>
          <table:table-cell office:value-type="float" office:value="2461058.60227" calcext:value-type="float">
            <text:p>2461058.60227</text:p>
          </table:table-cell>
          <table:table-cell office:value-type="float" office:value="7.269" calcext:value-type="float">
            <text:p>7.26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8])" office:value-type="date" office:date-value="2026-01-18T02:28:49.44" calcext:value-type="date">
            <text:p>2026-01-18</text:p>
          </table:table-cell>
          <table:table-cell office:value-type="float" office:value="2461058.60335" calcext:value-type="float">
            <text:p>2461058.60335</text:p>
          </table:table-cell>
          <table:table-cell office:value-type="float" office:value="8.791" calcext:value-type="float">
            <text:p>8.79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79])" office:value-type="date" office:date-value="2026-01-18T02:30:22.75199" calcext:value-type="date">
            <text:p>2026-01-18</text:p>
          </table:table-cell>
          <table:table-cell office:value-type="float" office:value="2461058.60443" calcext:value-type="float">
            <text:p>2461058.60443</text:p>
          </table:table-cell>
          <table:table-cell office:value-type="float" office:value="7.265" calcext:value-type="float">
            <text:p>7.26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0])" office:value-type="date" office:date-value="2026-01-18T02:31:56.92802" calcext:value-type="date">
            <text:p>2026-01-18</text:p>
          </table:table-cell>
          <table:table-cell office:value-type="float" office:value="2461058.60552" calcext:value-type="float">
            <text:p>2461058.60552</text:p>
          </table:table-cell>
          <table:table-cell office:value-type="float" office:value="8.776" calcext:value-type="float">
            <text:p>8.77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1])" office:value-type="date" office:date-value="2026-01-18T02:33:30.24" calcext:value-type="date">
            <text:p>2026-01-18</text:p>
          </table:table-cell>
          <table:table-cell office:value-type="float" office:value="2461058.6066" calcext:value-type="float">
            <text:p>2461058.6066</text:p>
          </table:table-cell>
          <table:table-cell office:value-type="float" office:value="7.267" calcext:value-type="float">
            <text:p>7.26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2])" office:value-type="date" office:date-value="2026-01-18T02:35:03.55199" calcext:value-type="date">
            <text:p>2026-01-18</text:p>
          </table:table-cell>
          <table:table-cell office:value-type="float" office:value="2461058.60768" calcext:value-type="float">
            <text:p>2461058.60768</text:p>
          </table:table-cell>
          <table:table-cell office:value-type="float" office:value="8.802" calcext:value-type="float">
            <text:p>8.80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3])" office:value-type="date" office:date-value="2026-01-18T02:36:36.86402" calcext:value-type="date">
            <text:p>2026-01-18</text:p>
          </table:table-cell>
          <table:table-cell office:value-type="float" office:value="2461058.60876" calcext:value-type="float">
            <text:p>2461058.60876</text:p>
          </table:table-cell>
          <table:table-cell office:value-type="float" office:value="7.246" calcext:value-type="float">
            <text:p>7.24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4])" office:value-type="date" office:date-value="2026-01-18T02:38:11.04001" calcext:value-type="date">
            <text:p>2026-01-18</text:p>
          </table:table-cell>
          <table:table-cell office:value-type="float" office:value="2461058.60985" calcext:value-type="float">
            <text:p>2461058.60985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5])" office:value-type="date" office:date-value="2026-01-18T02:39:44.352" calcext:value-type="date">
            <text:p>2026-01-18</text:p>
          </table:table-cell>
          <table:table-cell office:value-type="float" office:value="2461058.61093" calcext:value-type="float">
            <text:p>2461058.61093</text:p>
          </table:table-cell>
          <table:table-cell office:value-type="float" office:value="7.273" calcext:value-type="float">
            <text:p>7.27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6])" office:value-type="date" office:date-value="2026-01-18T02:41:17.66398" calcext:value-type="date">
            <text:p>2026-01-18</text:p>
          </table:table-cell>
          <table:table-cell office:value-type="float" office:value="2461058.61201" calcext:value-type="float">
            <text:p>2461058.61201</text:p>
          </table:table-cell>
          <table:table-cell office:value-type="float" office:value="8.768" calcext:value-type="float">
            <text:p>8.76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7])" office:value-type="date" office:date-value="2026-01-18T02:42:50.97601" calcext:value-type="date">
            <text:p>2026-01-18</text:p>
          </table:table-cell>
          <table:table-cell office:value-type="float" office:value="2461058.61309" calcext:value-type="float">
            <text:p>2461058.61309</text:p>
          </table:table-cell>
          <table:table-cell office:value-type="float" office:value="7.231" calcext:value-type="float">
            <text:p>7.23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8])" office:value-type="date" office:date-value="2026-01-18T02:44:25.152" calcext:value-type="date">
            <text:p>2026-01-18</text:p>
          </table:table-cell>
          <table:table-cell office:value-type="float" office:value="2461058.61418" calcext:value-type="float">
            <text:p>2461058.61418</text:p>
          </table:table-cell>
          <table:table-cell office:value-type="float" office:value="8.774" calcext:value-type="float">
            <text:p>8.77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89])" office:value-type="date" office:date-value="2026-01-18T04:35:08.44802" calcext:value-type="date">
            <text:p>2026-01-18</text:p>
          </table:table-cell>
          <table:table-cell office:value-type="float" office:value="2461058.69107" calcext:value-type="float">
            <text:p>2461058.69107</text:p>
          </table:table-cell>
          <table:table-cell office:value-type="float" office:value="5.6622" calcext:value-type="float">
            <text:p>5.662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0])" office:value-type="date" office:date-value="2026-01-18T04:42:42.91202" calcext:value-type="date">
            <text:p>2026-01-18</text:p>
          </table:table-cell>
          <table:table-cell office:value-type="float" office:value="2461058.69633" calcext:value-type="float">
            <text:p>2461058.69633</text:p>
          </table:table-cell>
          <table:table-cell office:value-type="float" office:value="7.0077" calcext:value-type="float">
            <text:p>7.007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1])" office:value-type="date" office:date-value="2026-01-18T04:53:21.40801" calcext:value-type="date">
            <text:p>2026-01-18</text:p>
          </table:table-cell>
          <table:table-cell office:value-type="float" office:value="2461058.70372" calcext:value-type="float">
            <text:p>2461058.70372</text:p>
          </table:table-cell>
          <table:table-cell office:value-type="float" office:value="7.5884" calcext:value-type="float">
            <text:p>7.588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2])" office:value-type="date" office:date-value="2026-01-18T17:35:31.2" calcext:value-type="date">
            <text:p>2026-01-18</text:p>
          </table:table-cell>
          <table:table-cell office:value-type="float" office:value="2461059.233" calcext:value-type="float">
            <text:p>2461059.233</text:p>
          </table:table-cell>
          <table:table-cell office:value-type="float" office:value="7.309" calcext:value-type="float">
            <text:p>7.30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3])" office:value-type="date" office:date-value="2026-01-18T17:39:59.90399" calcext:value-type="date">
            <text:p>2026-01-18</text:p>
          </table:table-cell>
          <table:table-cell office:value-type="float" office:value="2461059.23611" calcext:value-type="float">
            <text:p>2461059.23611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4])" office:value-type="date" office:date-value="2026-01-18T18:37:26.40001" calcext:value-type="date">
            <text:p>2026-01-18</text:p>
          </table:table-cell>
          <table:table-cell office:value-type="float" office:value="2461059.276" calcext:value-type="float">
            <text:p>2461059.276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5])" office:value-type="date" office:date-value="2026-01-18T20:06:59.616" calcext:value-type="date">
            <text:p>2026-01-18</text:p>
          </table:table-cell>
          <table:table-cell office:value-type="float" office:value="2461059.33819" calcext:value-type="float">
            <text:p>2461059.3381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6])" office:value-type="date" office:date-value="2026-01-19T00:10:39.36" calcext:value-type="date">
            <text:p>2026-01-19</text:p>
          </table:table-cell>
          <table:table-cell office:value-type="float" office:value="2461059.5074" calcext:value-type="float">
            <text:p>2461059.507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7])" office:value-type="date" office:date-value="2026-01-19T01:27:00.288" calcext:value-type="date">
            <text:p>2026-01-19</text:p>
          </table:table-cell>
          <table:table-cell office:value-type="float" office:value="2461059.56042" calcext:value-type="float">
            <text:p>2461059.5604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8])" office:value-type="date" office:date-value="2026-01-20T04:26:51.64801" calcext:value-type="date">
            <text:p>2026-01-20</text:p>
          </table:table-cell>
          <table:table-cell office:value-type="float" office:value="2461060.68532" calcext:value-type="float">
            <text:p>2461060.68532</text:p>
          </table:table-cell>
          <table:table-cell office:value-type="float" office:value="5.4964" calcext:value-type="float">
            <text:p>5.496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299])" office:value-type="date" office:date-value="2026-01-20T04:34:36.48001" calcext:value-type="date">
            <text:p>2026-01-20</text:p>
          </table:table-cell>
          <table:table-cell office:value-type="float" office:value="2461060.6907" calcext:value-type="float">
            <text:p>2461060.6907</text:p>
          </table:table-cell>
          <table:table-cell office:value-type="float" office:value="6.8792" calcext:value-type="float">
            <text:p>6.879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0])" office:value-type="date" office:date-value="2026-01-20T04:46:24.96002" calcext:value-type="date">
            <text:p>2026-01-20</text:p>
          </table:table-cell>
          <table:table-cell office:value-type="float" office:value="2461060.6989" calcext:value-type="float">
            <text:p>2461060.6989</text:p>
          </table:table-cell>
          <table:table-cell office:value-type="float" office:value="7.5609" calcext:value-type="float">
            <text:p>7.560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1])" office:value-type="date" office:date-value="2026-01-21T04:00:36.57601" calcext:value-type="date">
            <text:p>2026-01-21</text:p>
          </table:table-cell>
          <table:table-cell office:value-type="float" office:value="2461061.66709" calcext:value-type="float">
            <text:p>2461061.66709</text:p>
          </table:table-cell>
          <table:table-cell office:value-type="float" office:value="5.3858" calcext:value-type="float">
            <text:p>5.385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2])" office:value-type="date" office:date-value="2026-01-21T04:08:19.68" calcext:value-type="date">
            <text:p>2026-01-21</text:p>
          </table:table-cell>
          <table:table-cell office:value-type="float" office:value="2461061.67245" calcext:value-type="float">
            <text:p>2461061.67245</text:p>
          </table:table-cell>
          <table:table-cell office:value-type="float" office:value="6.9014" calcext:value-type="float">
            <text:p>6.901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3])" office:value-type="date" office:date-value="2026-01-21T04:19:56.06399" calcext:value-type="date">
            <text:p>2026-01-21</text:p>
          </table:table-cell>
          <table:table-cell office:value-type="float" office:value="2461061.68051" calcext:value-type="float">
            <text:p>2461061.68051</text:p>
          </table:table-cell>
          <table:table-cell office:value-type="float" office:value="7.6254" calcext:value-type="float">
            <text:p>7.625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4])" office:value-type="date" office:date-value="2026-01-22T11:19:59.80799" calcext:value-type="date">
            <text:p>2026-01-22</text:p>
          </table:table-cell>
          <table:table-cell office:value-type="float" office:value="2461062.97222" calcext:value-type="float">
            <text:p>2461062.9722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5])" office:value-type="date" office:date-value="2026-01-24T20:08:09.60001" calcext:value-type="date">
            <text:p>2026-01-24</text:p>
          </table:table-cell>
          <table:table-cell office:value-type="float" office:value="2461065.339" calcext:value-type="float">
            <text:p>2461065.339</text:p>
          </table:table-cell>
          <table:table-cell office:value-type="float" office:value="7.291" calcext:value-type="float">
            <text:p>7.29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6])" office:value-type="date" office:date-value="2026-01-26T04:22:27.26401" calcext:value-type="date">
            <text:p>2026-01-26</text:p>
          </table:table-cell>
          <table:table-cell office:value-type="float" office:value="2461066.68226" calcext:value-type="float">
            <text:p>2461066.68226</text:p>
          </table:table-cell>
          <table:table-cell office:value-type="float" office:value="5.5494" calcext:value-type="float">
            <text:p>5.549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7])" office:value-type="date" office:date-value="2026-01-26T04:30:05.184" calcext:value-type="date">
            <text:p>2026-01-26</text:p>
          </table:table-cell>
          <table:table-cell office:value-type="float" office:value="2461066.68756" calcext:value-type="float">
            <text:p>2461066.68756</text:p>
          </table:table-cell>
          <table:table-cell office:value-type="float" office:value="6.9678" calcext:value-type="float">
            <text:p>6.967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8])" office:value-type="date" office:date-value="2026-01-26T04:40:47.13602" calcext:value-type="date">
            <text:p>2026-01-26</text:p>
          </table:table-cell>
          <table:table-cell office:value-type="float" office:value="2461066.69499" calcext:value-type="float">
            <text:p>2461066.69499</text:p>
          </table:table-cell>
          <table:table-cell office:value-type="float" office:value="7.6434" calcext:value-type="float">
            <text:p>7.643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09])" office:value-type="date" office:date-value="2026-01-27T00:58:59.808" calcext:value-type="date">
            <text:p>2026-01-27</text:p>
          </table:table-cell>
          <table:table-cell office:value-type="float" office:value="2461067.54097" calcext:value-type="float">
            <text:p>2461067.5409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0])" office:value-type="date" office:date-value="2026-01-28T11:35:00.09601" calcext:value-type="date">
            <text:p>2026-01-28</text:p>
          </table:table-cell>
          <table:table-cell office:value-type="float" office:value="2461068.98264" calcext:value-type="float">
            <text:p>2461068.9826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1])" office:value-type="date" office:date-value="2026-01-30T04:06:55.872" calcext:value-type="date">
            <text:p>2026-01-30</text:p>
          </table:table-cell>
          <table:table-cell office:value-type="float" office:value="2461070.67148" calcext:value-type="float">
            <text:p>2461070.67148</text:p>
          </table:table-cell>
          <table:table-cell office:value-type="float" office:value="5.6135" calcext:value-type="float">
            <text:p>5.613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2])" office:value-type="date" office:date-value="2026-01-30T04:14:36.38401" calcext:value-type="date">
            <text:p>2026-01-30</text:p>
          </table:table-cell>
          <table:table-cell office:value-type="float" office:value="2461070.67681" calcext:value-type="float">
            <text:p>2461070.67681</text:p>
          </table:table-cell>
          <table:table-cell office:value-type="float" office:value="6.9275" calcext:value-type="float">
            <text:p>6.927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3])" office:value-type="date" office:date-value="2026-01-30T04:25:13.15199" calcext:value-type="date">
            <text:p>2026-01-30</text:p>
          </table:table-cell>
          <table:table-cell office:value-type="float" office:value="2461070.68418" calcext:value-type="float">
            <text:p>2461070.68418</text:p>
          </table:table-cell>
          <table:table-cell office:value-type="float" office:value="7.5376" calcext:value-type="float">
            <text:p>7.537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4])" office:value-type="date" office:date-value="2026-01-30T16:54:08.15038" calcext:value-type="date">
            <text:p>2026-01-30</text:p>
          </table:table-cell>
          <table:table-cell office:value-type="float" office:value="2461071.204261" calcext:value-type="float">
            <text:p>2461071.204261</text:p>
          </table:table-cell>
          <table:table-cell office:value-type="float" office:value="7.027" calcext:value-type="float">
            <text:p>7.02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5])" office:value-type="date" office:date-value="2026-02-01T01:03:00.00002" calcext:value-type="date">
            <text:p>2026-02-01</text:p>
          </table:table-cell>
          <table:table-cell office:value-type="float" office:value="2461072.54375" calcext:value-type="float">
            <text:p>2461072.5437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6])" office:value-type="date" office:date-value="2026-02-01T03:48:54.14401" calcext:value-type="date">
            <text:p>2026-02-01</text:p>
          </table:table-cell>
          <table:table-cell office:value-type="float" office:value="2461072.65896" calcext:value-type="float">
            <text:p>2461072.65896</text:p>
          </table:table-cell>
          <table:table-cell office:value-type="float" office:value="5.1549" calcext:value-type="float">
            <text:p>5.154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7])" office:value-type="date" office:date-value="2026-02-01T03:54:58.75201" calcext:value-type="date">
            <text:p>2026-02-01</text:p>
          </table:table-cell>
          <table:table-cell office:value-type="float" office:value="2461072.66318" calcext:value-type="float">
            <text:p>2461072.66318</text:p>
          </table:table-cell>
          <table:table-cell office:value-type="float" office:value="6.4417" calcext:value-type="float">
            <text:p>6.441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8])" office:value-type="date" office:date-value="2026-02-01T04:01:30.14402" calcext:value-type="date">
            <text:p>2026-02-01</text:p>
          </table:table-cell>
          <table:table-cell office:value-type="float" office:value="2461072.66771" calcext:value-type="float">
            <text:p>2461072.66771</text:p>
          </table:table-cell>
          <table:table-cell office:value-type="float" office:value="7.3271" calcext:value-type="float">
            <text:p>7.327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19])" office:value-type="date" office:date-value="2026-02-01T04:06:36.00001" calcext:value-type="date">
            <text:p>2026-02-01</text:p>
          </table:table-cell>
          <table:table-cell office:value-type="float" office:value="2461072.67125" calcext:value-type="float">
            <text:p>2461072.67125</text:p>
          </table:table-cell>
          <table:table-cell office:value-type="float" office:value="8.9317" calcext:value-type="float">
            <text:p>8.931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0])" office:value-type="date" office:date-value="2026-02-02T03:31:48.57601" calcext:value-type="date">
            <text:p>2026-02-02</text:p>
          </table:table-cell>
          <table:table-cell office:value-type="float" office:value="2461073.64709" calcext:value-type="float">
            <text:p>2461073.64709</text:p>
          </table:table-cell>
          <table:table-cell office:value-type="float" office:value="5.1905" calcext:value-type="float">
            <text:p>5.190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1])" office:value-type="date" office:date-value="2026-02-02T03:37:15.168" calcext:value-type="date">
            <text:p>2026-02-02</text:p>
          </table:table-cell>
          <table:table-cell office:value-type="float" office:value="2461073.65087" calcext:value-type="float">
            <text:p>2461073.65087</text:p>
          </table:table-cell>
          <table:table-cell office:value-type="float" office:value="6.5178" calcext:value-type="float">
            <text:p>6.517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2])" office:value-type="date" office:date-value="2026-02-02T03:42:07.20001" calcext:value-type="date">
            <text:p>2026-02-02</text:p>
          </table:table-cell>
          <table:table-cell office:value-type="float" office:value="2461073.65425" calcext:value-type="float">
            <text:p>2461073.65425</text:p>
          </table:table-cell>
          <table:table-cell office:value-type="float" office:value="7.3582" calcext:value-type="float">
            <text:p>7.358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3])" office:value-type="date" office:date-value="2026-02-02T03:47:19.10401" calcext:value-type="date">
            <text:p>2026-02-02</text:p>
          </table:table-cell>
          <table:table-cell office:value-type="float" office:value="2461073.65786" calcext:value-type="float">
            <text:p>2461073.65786</text:p>
          </table:table-cell>
          <table:table-cell office:value-type="float" office:value="8.9388" calcext:value-type="float">
            <text:p>8.938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4])" office:value-type="date" office:date-value="2026-02-02T18:31:00.192" calcext:value-type="date">
            <text:p>2026-02-02</text:p>
          </table:table-cell>
          <table:table-cell office:value-type="float" office:value="2461074.27153" calcext:value-type="float">
            <text:p>2461074.2715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5])" office:value-type="date" office:date-value="2026-02-04T11:32:00.384" calcext:value-type="date">
            <text:p>2026-02-04</text:p>
          </table:table-cell>
          <table:table-cell office:value-type="float" office:value="2461075.98056" calcext:value-type="float">
            <text:p>2461075.9805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6])" office:value-type="date" office:date-value="2026-02-04T16:45:00.28802" calcext:value-type="date">
            <text:p>2026-02-04</text:p>
          </table:table-cell>
          <table:table-cell office:value-type="float" office:value="2461076.19792" calcext:value-type="float">
            <text:p>2461076.1979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7])" office:value-type="date" office:date-value="2026-02-07T01:07:59.80801" calcext:value-type="date">
            <text:p>2026-02-07</text:p>
          </table:table-cell>
          <table:table-cell office:value-type="float" office:value="2461078.54722" calcext:value-type="float">
            <text:p>2461078.5472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8])" office:value-type="date" office:date-value="2026-02-12T00:36:43.2" calcext:value-type="date">
            <text:p>2026-02-12</text:p>
          </table:table-cell>
          <table:table-cell office:value-type="float" office:value="2461083.5255" calcext:value-type="float">
            <text:p>2461083.525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29])" office:value-type="date" office:date-value="2026-02-14T18:15:50.39999" calcext:value-type="date">
            <text:p>2026-02-14</text:p>
          </table:table-cell>
          <table:table-cell office:value-type="float" office:value="2461086.261" calcext:value-type="float">
            <text:p>2461086.26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0])" office:value-type="date" office:date-value="2026-02-16T01:16:59.80801" calcext:value-type="date">
            <text:p>2026-02-16</text:p>
          </table:table-cell>
          <table:table-cell office:value-type="float" office:value="2461087.55347" calcext:value-type="float">
            <text:p>2461087.5534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1])" office:value-type="date" office:date-value="2026-02-16T15:40:00.19201" calcext:value-type="date">
            <text:p>2026-02-16</text:p>
          </table:table-cell>
          <table:table-cell office:value-type="float" office:value="2461088.15278" calcext:value-type="float">
            <text:p>2461088.1527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2])" office:value-type="date" office:date-value="2026-02-17T18:20:09.6" calcext:value-type="date">
            <text:p>2026-02-17</text:p>
          </table:table-cell>
          <table:table-cell office:value-type="float" office:value="2461089.264" calcext:value-type="float">
            <text:p>2461089.264</text:p>
          </table:table-cell>
          <table:table-cell office:value-type="float" office:value="7.337" calcext:value-type="float">
            <text:p>7.33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3])" office:value-type="date" office:date-value="2026-02-17T18:22:45.12001" calcext:value-type="date">
            <text:p>2026-02-17</text:p>
          </table:table-cell>
          <table:table-cell office:value-type="float" office:value="2461089.2658" calcext:value-type="float">
            <text:p>2461089.2658</text:p>
          </table:table-cell>
          <table:table-cell office:value-type="float" office:value="7.372" calcext:value-type="float">
            <text:p>7.37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4])" office:value-type="date" office:date-value="2026-02-18T17:35:59.71202" calcext:value-type="date">
            <text:p>2026-02-18</text:p>
          </table:table-cell>
          <table:table-cell office:value-type="float" office:value="2461090.23333" calcext:value-type="float">
            <text:p>2461090.23333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5])" office:value-type="date" office:date-value="2026-02-20T20:04:59.52001" calcext:value-type="date">
            <text:p>2026-02-20</text:p>
          </table:table-cell>
          <table:table-cell office:value-type="float" office:value="2461092.3368" calcext:value-type="float">
            <text:p>2461092.336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6])" office:value-type="date" office:date-value="2026-02-21T19:33:01.44001" calcext:value-type="date">
            <text:p>2026-02-21</text:p>
          </table:table-cell>
          <table:table-cell office:value-type="float" office:value="2461093.3146" calcext:value-type="float">
            <text:p>2461093.314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7])" office:value-type="date" office:date-value="2026-02-22T01:18:59.904" calcext:value-type="date">
            <text:p>2026-02-22</text:p>
          </table:table-cell>
          <table:table-cell office:value-type="float" office:value="2461093.55486" calcext:value-type="float">
            <text:p>2461093.554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8])" office:value-type="date" office:date-value="2026-02-22T19:39:56.15999" calcext:value-type="date">
            <text:p>2026-02-22</text:p>
          </table:table-cell>
          <table:table-cell office:value-type="float" office:value="2461094.3194" calcext:value-type="float">
            <text:p>2461094.319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39])" office:value-type="date" office:date-value="2026-02-23T19:27:59.04" calcext:value-type="date">
            <text:p>2026-02-23</text:p>
          </table:table-cell>
          <table:table-cell office:value-type="float" office:value="2461095.3111" calcext:value-type="float">
            <text:p>2461095.311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0])" office:value-type="date" office:date-value="2026-02-25T11:08:59.71199" calcext:value-type="date">
            <text:p>2026-02-25</text:p>
          </table:table-cell>
          <table:table-cell office:value-type="float" office:value="2461096.96458" calcext:value-type="float">
            <text:p>2461096.9645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1])" office:value-type="date" office:date-value="2026-02-25T19:01:20.63998" calcext:value-type="date">
            <text:p>2026-02-25</text:p>
          </table:table-cell>
          <table:table-cell office:value-type="float" office:value="2461097.2926" calcext:value-type="float">
            <text:p>2461097.2926</text:p>
          </table:table-cell>
          <table:table-cell office:value-type="float" office:value="7.302" calcext:value-type="float">
            <text:p>7.30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2])" office:value-type="date" office:date-value="2026-03-01T01:18:59.904" calcext:value-type="date">
            <text:p>2026-03-01</text:p>
          </table:table-cell>
          <table:table-cell office:value-type="float" office:value="2461100.55486" calcext:value-type="float">
            <text:p>2461100.554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3])" office:value-type="date" office:date-value="2026-03-02T18:44:38.4" calcext:value-type="date">
            <text:p>2026-03-02</text:p>
          </table:table-cell>
          <table:table-cell office:value-type="float" office:value="2461102.281" calcext:value-type="float">
            <text:p>2461102.28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4])" office:value-type="date" office:date-value="2026-03-05T18:06:59.90402" calcext:value-type="date">
            <text:p>2026-03-05</text:p>
          </table:table-cell>
          <table:table-cell office:value-type="float" office:value="2461105.25486" calcext:value-type="float">
            <text:p>2461105.2548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5])" office:value-type="date" office:date-value="2026-03-08T18:53:16.8" calcext:value-type="date">
            <text:p>2026-03-08</text:p>
          </table:table-cell>
          <table:table-cell office:value-type="float" office:value="2461108.287" calcext:value-type="float">
            <text:p>2461108.28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6])" office:value-type="date" office:date-value="2026-03-13T01:18:59.904" calcext:value-type="date">
            <text:p>2026-03-13</text:p>
          </table:table-cell>
          <table:table-cell office:value-type="float" office:value="2461112.55486" calcext:value-type="float">
            <text:p>2461112.5548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7])" office:value-type="date" office:date-value="2026-03-13T18:15:15.84001" calcext:value-type="date">
            <text:p>2026-03-13</text:p>
          </table:table-cell>
          <table:table-cell office:value-type="float" office:value="2461113.2606" calcext:value-type="float">
            <text:p>2461113.2606</text:p>
          </table:table-cell>
          <table:table-cell office:value-type="float" office:value="7.245" calcext:value-type="float">
            <text:p>7.24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8])" office:value-type="date" office:date-value="2026-03-13T18:16:24.96002" calcext:value-type="date">
            <text:p>2026-03-13</text:p>
          </table:table-cell>
          <table:table-cell office:value-type="float" office:value="2461113.2614" calcext:value-type="float">
            <text:p>2461113.2614</text:p>
          </table:table-cell>
          <table:table-cell office:value-type="float" office:value="7.304" calcext:value-type="float">
            <text:p>7.30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49])" office:value-type="date" office:date-value="2026-03-14T01:25:00.19201" calcext:value-type="date">
            <text:p>2026-03-14</text:p>
          </table:table-cell>
          <table:table-cell office:value-type="float" office:value="2461113.55903" calcext:value-type="float">
            <text:p>2461113.5590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0])" office:value-type="date" office:date-value="2026-03-14T18:43:11.99998" calcext:value-type="date">
            <text:p>2026-03-14</text:p>
          </table:table-cell>
          <table:table-cell office:value-type="float" office:value="2461114.28" calcext:value-type="float">
            <text:p>2461114.2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1])" office:value-type="date" office:date-value="2026-03-21T01:25:00.19201" calcext:value-type="date">
            <text:p>2026-03-21</text:p>
          </table:table-cell>
          <table:table-cell office:value-type="float" office:value="2461120.55903" calcext:value-type="float">
            <text:p>2461120.5590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2])" office:value-type="date" office:date-value="2026-05-02T10:50:00.09601" calcext:value-type="date">
            <text:p>2026-05-02</text:p>
          </table:table-cell>
          <table:table-cell office:value-type="float" office:value="2461162.95139" calcext:value-type="float">
            <text:p>2461162.9513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3])" office:value-type="date" office:date-value="2026-05-03T10:52:00.19199" calcext:value-type="date">
            <text:p>2026-05-03</text:p>
          </table:table-cell>
          <table:table-cell office:value-type="float" office:value="2461163.95278" calcext:value-type="float">
            <text:p>2461163.9527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4])" office:value-type="date" office:date-value="2026-05-10T01:11:59.99998" calcext:value-type="date">
            <text:p>2026-05-10</text:p>
          </table:table-cell>
          <table:table-cell office:value-type="float" office:value="2461170.55" calcext:value-type="float">
            <text:p>2461170.5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5])" office:value-type="date" office:date-value="2026-05-10T01:56:59.99998" calcext:value-type="date">
            <text:p>2026-05-10</text:p>
          </table:table-cell>
          <table:table-cell office:value-type="float" office:value="2461170.58125" calcext:value-type="float">
            <text:p>2461170.5812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6])" office:value-type="date" office:date-value="2026-05-12T10:11:59.99998" calcext:value-type="date">
            <text:p>2026-05-12</text:p>
          </table:table-cell>
          <table:table-cell office:value-type="float" office:value="2461172.925" calcext:value-type="float">
            <text:p>2461172.92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7])" office:value-type="date" office:date-value="2026-05-14T10:41:59.71201" calcext:value-type="date">
            <text:p>2026-05-14</text:p>
          </table:table-cell>
          <table:table-cell office:value-type="float" office:value="2461174.94583" calcext:value-type="float">
            <text:p>2461174.9458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8])" office:value-type="date" office:date-value="2026-05-16T03:10:56.64001" calcext:value-type="date">
            <text:p>2026-05-16</text:p>
          </table:table-cell>
          <table:table-cell office:value-type="float" office:value="2461176.6326" calcext:value-type="float">
            <text:p>2461176.632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59])" office:value-type="date" office:date-value="2026-05-20T03:18:00.00002" calcext:value-type="date">
            <text:p>2026-05-20</text:p>
          </table:table-cell>
          <table:table-cell office:value-type="float" office:value="2461180.6375" calcext:value-type="float">
            <text:p>2461180.637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0])" office:value-type="date" office:date-value="2026-05-21T03:12:57.60001" calcext:value-type="date">
            <text:p>2026-05-21</text:p>
          </table:table-cell>
          <table:table-cell office:value-type="float" office:value="2461181.634" calcext:value-type="float">
            <text:p>2461181.63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1])" office:value-type="date" office:date-value="2026-05-22T03:13:58.07998" calcext:value-type="date">
            <text:p>2026-05-22</text:p>
          </table:table-cell>
          <table:table-cell office:value-type="float" office:value="2461182.6347" calcext:value-type="float">
            <text:p>2461182.634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2])" office:value-type="date" office:date-value="2026-05-23T03:23:02.39999" calcext:value-type="date">
            <text:p>2026-05-23</text:p>
          </table:table-cell>
          <table:table-cell office:value-type="float" office:value="2461183.641" calcext:value-type="float">
            <text:p>2461183.64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3])" office:value-type="date" office:date-value="2026-05-26T10:07:59.80801" calcext:value-type="date">
            <text:p>2026-05-26</text:p>
          </table:table-cell>
          <table:table-cell office:value-type="float" office:value="2461186.92222" calcext:value-type="float">
            <text:p>2461186.92222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4])" office:value-type="date" office:date-value="2026-05-27T02:52:56.63999" calcext:value-type="date">
            <text:p>2026-05-27</text:p>
          </table:table-cell>
          <table:table-cell office:value-type="float" office:value="2461187.6201" calcext:value-type="float">
            <text:p>2461187.620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5])" office:value-type="date" office:date-value="2026-05-28T02:49:03.35999" calcext:value-type="date">
            <text:p>2026-05-28</text:p>
          </table:table-cell>
          <table:table-cell office:value-type="float" office:value="2461188.6174" calcext:value-type="float">
            <text:p>2461188.617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6])" office:value-type="date" office:date-value="2026-05-30T00:53:00.384" calcext:value-type="date">
            <text:p>2026-05-30</text:p>
          </table:table-cell>
          <table:table-cell office:value-type="float" office:value="2461190.53681" calcext:value-type="float">
            <text:p>2461190.5368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7])" office:value-type="date" office:date-value="2026-06-02T10:20:00.38398" calcext:value-type="date">
            <text:p>2026-06-02</text:p>
          </table:table-cell>
          <table:table-cell office:value-type="float" office:value="2461193.93056" calcext:value-type="float">
            <text:p>2461193.93056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8])" office:value-type="date" office:date-value="2026-06-06T02:31:03.36001" calcext:value-type="date">
            <text:p>2026-06-06</text:p>
          </table:table-cell>
          <table:table-cell office:value-type="float" office:value="2461197.6049" calcext:value-type="float">
            <text:p>2461197.604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69])" office:value-type="date" office:date-value="2026-06-07T02:20:58.55999" calcext:value-type="date">
            <text:p>2026-06-07</text:p>
          </table:table-cell>
          <table:table-cell office:value-type="float" office:value="2461198.5979" calcext:value-type="float">
            <text:p>2461198.597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0])" office:value-type="date" office:date-value="2026-06-08T01:28:59.51998" calcext:value-type="date">
            <text:p>2026-06-08</text:p>
          </table:table-cell>
          <table:table-cell office:value-type="float" office:value="2461199.5618" calcext:value-type="float">
            <text:p>2461199.561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1])" office:value-type="date" office:date-value="2026-06-09T02:16:56.64" calcext:value-type="date">
            <text:p>2026-06-09</text:p>
          </table:table-cell>
          <table:table-cell office:value-type="float" office:value="2461200.5951" calcext:value-type="float">
            <text:p>2461200.595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2])" office:value-type="date" office:date-value="2026-06-10T01:27:59.04" calcext:value-type="date">
            <text:p>2026-06-10</text:p>
          </table:table-cell>
          <table:table-cell office:value-type="float" office:value="2461201.5611" calcext:value-type="float">
            <text:p>2461201.561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3])" office:value-type="date" office:date-value="2026-06-11T01:35:02.40001" calcext:value-type="date">
            <text:p>2026-06-11</text:p>
          </table:table-cell>
          <table:table-cell office:value-type="float" office:value="2461202.566" calcext:value-type="float">
            <text:p>2461202.56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4])" office:value-type="date" office:date-value="2026-06-11T10:30:59.61601" calcext:value-type="date">
            <text:p>2026-06-11</text:p>
          </table:table-cell>
          <table:table-cell office:value-type="float" office:value="2461202.93819" calcext:value-type="float">
            <text:p>2461202.9381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5])" office:value-type="date" office:date-value="2026-06-12T01:18:02.88001" calcext:value-type="date">
            <text:p>2026-06-12</text:p>
          </table:table-cell>
          <table:table-cell office:value-type="float" office:value="2461203.5542" calcext:value-type="float">
            <text:p>2461203.554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6])" office:value-type="date" office:date-value="2026-06-16T02:39:59.03999" calcext:value-type="date">
            <text:p>2026-06-16</text:p>
          </table:table-cell>
          <table:table-cell office:value-type="float" office:value="2461207.6111" calcext:value-type="float">
            <text:p>2461207.611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7])" office:value-type="date" office:date-value="2026-06-17T02:19:58.08002" calcext:value-type="date">
            <text:p>2026-06-17</text:p>
          </table:table-cell>
          <table:table-cell office:value-type="float" office:value="2461208.5972" calcext:value-type="float">
            <text:p>2461208.597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8])" office:value-type="date" office:date-value="2026-06-27T00:58:59.808" calcext:value-type="date">
            <text:p>2026-06-27</text:p>
          </table:table-cell>
          <table:table-cell office:value-type="float" office:value="2461218.54097" calcext:value-type="float">
            <text:p>2461218.5409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79])" office:value-type="date" office:date-value="2026-06-27T09:56:59.71201" calcext:value-type="date">
            <text:p>2026-06-27</text:p>
          </table:table-cell>
          <table:table-cell office:value-type="float" office:value="2461218.91458" calcext:value-type="float">
            <text:p>2461218.91458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80])" office:value-type="date" office:date-value="2026-06-27T23:31:12" calcext:value-type="date">
            <text:p>2026-06-27</text:p>
          </table:table-cell>
          <table:table-cell office:value-type="float" office:value="2461219.48" calcext:value-type="float">
            <text:p>2461219.4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81])" office:value-type="date" office:date-value="2026-07-04T07:25:00.19201" calcext:value-type="date">
            <text:p>2026-07-04</text:p>
          </table:table-cell>
          <table:table-cell office:value-type="float" office:value="2461225.80903" calcext:value-type="float">
            <text:p>2461225.8090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82])" office:value-type="date" office:date-value="2026-07-10T09:04:59.80799" calcext:value-type="date">
            <text:p>2026-07-10</text:p>
          </table:table-cell>
          <table:table-cell office:value-type="float" office:value="2461231.87847" calcext:value-type="float">
            <text:p>2461231.8784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G AND</text:p>
          </table:table-cell>
        </table:table-row>
        <table:table-row table:style-name="ro1">
          <table:table-cell table:formula="of:=COM.EXAMPLE.JULIANDATE.JULIANDATEIMPL.FROMJULIANDATE([.B383])" office:value-type="date" office:date-value="2026-07-11T00:33:00.28799" calcext:value-type="date">
            <text:p>2026-07-11</text:p>
          </table:table-cell>
          <table:table-cell office:value-type="float" office:value="2461232.52292" calcext:value-type="float">
            <text:p>2461232.5229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G 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4T22:20:51.694597665</dc:date>
    <meta:editing-duration>PT27S</meta:editing-duration>
    <meta:editing-cycles>1</meta:editing-cycles>
    <meta:document-statistic meta:table-count="1" meta:cell-count="1532" meta:object-count="0"/>
    <meta:generator>LibreOffice/26.2.4.2$Linux_X86_64 LibreOffice_project/0229ac93fcf0d7cbc6376066c6f35021cef002dc</meta:generator>
  </office:meta>
</office:document-meta>
</file>